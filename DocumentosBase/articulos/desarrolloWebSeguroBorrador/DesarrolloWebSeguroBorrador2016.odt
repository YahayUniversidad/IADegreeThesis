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923000000D1A65605F9B737A58D.png" manifest:media-type="image/png"/>
  <manifest:file-entry manifest:full-path="Pictures/10000201000009230000014F1ECF4425100D09C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101cm" style:rel-column-width="8098*"/>
    </style:style>
    <style:style style:name="Tabla1.B" style:family="table-column">
      <style:table-column-properties style:column-width="14.9cm" style:rel-column-width="5743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6.995cm" table:align="left"/>
    </style:style>
    <style:style style:name="Tabla2.A" style:family="table-column">
      <style:table-column-properties style:column-width="2.402cm"/>
    </style:style>
    <style:style style:name="Tabla2.B" style:family="table-column">
      <style:table-column-properties style:column-width="14.59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0.905cm" style:rel-column-width="3488*"/>
    </style:style>
    <style:style style:name="Tabla5.B" style:family="table-column">
      <style:table-column-properties style:column-width="6.209cm" style:rel-column-width="23934*"/>
    </style:style>
    <style:style style:name="Tabla5.C" style:family="table-column">
      <style:table-column-properties style:column-width="9.887cm" style:rel-column-width="38113*"/>
    </style:style>
    <style:style style:name="Tabla5.A1" style:family="table-cell">
      <style:table-cell-properties style:vertical-align="middle" fo:padding="0.097cm" fo:border-left="0.05pt solid #000000" fo:border-right="none" fo:border-top="0.05pt solid #000000" fo:border-bottom="0.05pt solid #000000"/>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6" style:family="table">
      <style:table-properties style:width="12.749cm" style:rel-width="75%" table:align="center" style:writing-mode="lr-tb"/>
    </style:style>
    <style:style style:name="Tabla6.A" style:family="table-column">
      <style:table-column-properties style:column-width="1.76cm" style:rel-column-width="985*"/>
    </style:style>
    <style:style style:name="Tabla6.B" style:family="table-column">
      <style:table-column-properties style:column-width="3.561cm" style:rel-column-width="1992*"/>
    </style:style>
    <style:style style:name="Tabla6.C" style:family="table-column">
      <style:table-column-properties style:column-width="3.415cm" style:rel-column-width="1910*"/>
    </style:style>
    <style:style style:name="Tabla6.D" style:family="table-column">
      <style:table-column-properties style:column-width="4.013cm" style:rel-column-width="2245*"/>
    </style:style>
    <style:style style:name="Tabla6.1" style:family="table-row">
      <style:table-row-properties style:min-row-height="0.041cm" fo:keep-together="auto"/>
    </style:style>
    <style:style style:name="Tabla6.A1" style:family="table-cell">
      <style:table-cell-properties style:vertical-align="middle" fo:background-color="#ffffff" fo:padding-left="0.012cm" fo:padding-right="0.012cm" fo:padding-top="0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middle" fo:background-color="#ffffff"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la6.D1" style:family="table-cell">
      <style:table-cell-properties style:vertical-align="middle" fo:background-color="#ffffff" fo:padding-left="0.018cm" fo:padding-right="0.018cm" fo:padding-top="0cm" fo:padding-bottom="0cm" fo:border="0.5pt solid #000000" style:writing-mode="lr-tb">
        <style:background-image/>
      </style:table-cell-properties>
    </style:style>
    <style:style style:name="P1" style:family="paragraph" style:parent-style-name="Header">
      <style:text-properties officeooo:rsid="001413d3" officeooo:paragraph-rsid="001413d3"/>
    </style:style>
    <style:style style:name="P2" style:family="paragraph" style:parent-style-name="Footer">
      <style:text-properties fo:font-size="10pt" fo:font-weight="bold" officeooo:rsid="008109ed" officeooo:paragraph-rsid="008109ed" style:font-size-asian="10pt" style:font-weight-asian="bold" style:font-size-complex="10pt" style:font-weight-complex="bold"/>
    </style:style>
    <style:style style:name="P3" style:family="paragraph" style:parent-style-name="Footer">
      <style:text-properties fo:font-size="10pt" fo:font-weight="bold" officeooo:rsid="008109ed" officeooo:paragraph-rsid="0093b6ad" style:font-size-asian="10pt" style:font-weight-asian="bold" style:font-size-complex="10pt" style:font-weight-complex="bold"/>
    </style:style>
    <style:style style:name="P4" style:family="paragraph" style:parent-style-name="Text_20_body">
      <style:text-properties officeooo:rsid="001a7088" officeooo:paragraph-rsid="001a7088"/>
    </style:style>
    <style:style style:name="P5" style:family="paragraph" style:parent-style-name="Text_20_body">
      <style:text-properties officeooo:rsid="003779db" officeooo:paragraph-rsid="003779db"/>
    </style:style>
    <style:style style:name="P6" style:family="paragraph" style:parent-style-name="Text_20_body">
      <style:text-properties officeooo:rsid="003b51c6" officeooo:paragraph-rsid="003fe4ed"/>
    </style:style>
    <style:style style:name="P7" style:family="paragraph" style:parent-style-name="Text_20_body">
      <style:text-properties officeooo:rsid="009c9412" officeooo:paragraph-rsid="009c9412"/>
    </style:style>
    <style:style style:name="P8" style:family="paragraph" style:parent-style-name="Text_20_body">
      <style:text-properties officeooo:rsid="009c9412" officeooo:paragraph-rsid="00b1eef4"/>
    </style:style>
    <style:style style:name="P9" style:family="paragraph" style:parent-style-name="Text_20_body">
      <style:text-properties officeooo:rsid="009c9412" officeooo:paragraph-rsid="00e5fc2b"/>
    </style:style>
    <style:style style:name="P10" style:family="paragraph" style:parent-style-name="Text_20_body">
      <style:text-properties officeooo:rsid="009c9412" officeooo:paragraph-rsid="00e4f404"/>
    </style:style>
    <style:style style:name="P11" style:family="paragraph" style:parent-style-name="Text_20_body">
      <style:text-properties officeooo:rsid="009e1d0e" officeooo:paragraph-rsid="009e1d0e"/>
    </style:style>
    <style:style style:name="P12" style:family="paragraph" style:parent-style-name="Text_20_body">
      <style:text-properties officeooo:paragraph-rsid="009c9412"/>
    </style:style>
    <style:style style:name="P13" style:family="paragraph" style:parent-style-name="Text_20_body">
      <style:text-properties fo:font-style="normal" officeooo:rsid="009f7f63" officeooo:paragraph-rsid="009f7f63" style:font-style-asian="normal" style:font-style-complex="normal"/>
    </style:style>
    <style:style style:name="P14" style:family="paragraph" style:parent-style-name="Text_20_body">
      <style:text-properties fo:font-style="normal" officeooo:rsid="00c5aa8d" officeooo:paragraph-rsid="00c5aa8d" style:font-style-asian="normal" style:font-style-complex="normal"/>
    </style:style>
    <style:style style:name="P15" style:family="paragraph" style:parent-style-name="Text_20_body">
      <style:text-properties fo:font-style="italic" officeooo:rsid="009c9412" officeooo:paragraph-rsid="00b1eef4" style:font-style-asian="italic" style:font-style-complex="italic"/>
    </style:style>
    <style:style style:name="P16" style:family="paragraph" style:parent-style-name="Text_20_body">
      <style:text-properties fo:font-style="italic" officeooo:rsid="009c9412" officeooo:paragraph-rsid="00e29846" style:font-style-asian="italic" style:font-style-complex="italic"/>
    </style:style>
    <style:style style:name="P17" style:family="paragraph" style:parent-style-name="Text_20_body">
      <style:paragraph-properties fo:text-align="center" style:justify-single-word="false"/>
      <style:text-properties officeooo:paragraph-rsid="00b1eef4"/>
    </style:style>
    <style:style style:name="P18" style:family="paragraph" style:parent-style-name="Text_20_body">
      <style:text-properties officeooo:rsid="00ad9fb6" officeooo:paragraph-rsid="00ad9fb6"/>
    </style:style>
    <style:style style:name="P19" style:family="paragraph" style:parent-style-name="Text_20_body">
      <style:text-properties officeooo:paragraph-rsid="00adfc30"/>
    </style:style>
    <style:style style:name="P20" style:family="paragraph" style:parent-style-name="Text_20_body">
      <style:text-properties officeooo:rsid="00b0a32f" officeooo:paragraph-rsid="00b0a32f"/>
    </style:style>
    <style:style style:name="P21" style:family="paragraph" style:parent-style-name="Text_20_body">
      <style:text-properties officeooo:paragraph-rsid="00b1eef4"/>
    </style:style>
    <style:style style:name="P22" style:family="paragraph" style:parent-style-name="Text_20_body">
      <style:text-properties officeooo:rsid="00b8f64e" officeooo:paragraph-rsid="00b8f64e"/>
    </style:style>
    <style:style style:name="P23" style:family="paragraph" style:parent-style-name="Text_20_body">
      <style:text-properties officeooo:rsid="00ba44bc" officeooo:paragraph-rsid="00ba44bc"/>
    </style:style>
    <style:style style:name="P24" style:family="paragraph" style:parent-style-name="Text_20_body">
      <style:text-properties officeooo:rsid="00bcaf7a" officeooo:paragraph-rsid="00bcaf7a"/>
    </style:style>
    <style:style style:name="P25" style:family="paragraph" style:parent-style-name="Text_20_body">
      <style:text-properties officeooo:rsid="00bf74d4" officeooo:paragraph-rsid="00bf74d4"/>
    </style:style>
    <style:style style:name="P26" style:family="paragraph" style:parent-style-name="Text_20_body">
      <style:text-properties officeooo:rsid="00bfe952" officeooo:paragraph-rsid="00bfe952"/>
    </style:style>
    <style:style style:name="P27" style:family="paragraph" style:parent-style-name="Text_20_body">
      <style:text-properties officeooo:rsid="00c0b44f" officeooo:paragraph-rsid="00c0b44f"/>
    </style:style>
    <style:style style:name="P28" style:family="paragraph" style:parent-style-name="Text_20_body">
      <style:text-properties officeooo:rsid="00c65dbf" officeooo:paragraph-rsid="00c65dbf"/>
    </style:style>
    <style:style style:name="P29" style:family="paragraph" style:parent-style-name="Text_20_body">
      <style:text-properties officeooo:rsid="00c8c995" officeooo:paragraph-rsid="00c8c995"/>
    </style:style>
    <style:style style:name="P30" style:family="paragraph" style:parent-style-name="Text_20_body">
      <style:text-properties officeooo:rsid="00ca0806" officeooo:paragraph-rsid="00cb7a11"/>
    </style:style>
    <style:style style:name="P31" style:family="paragraph" style:parent-style-name="Text_20_body">
      <style:text-properties officeooo:rsid="00cadd48" officeooo:paragraph-rsid="00cadd48"/>
    </style:style>
    <style:style style:name="P32" style:family="paragraph" style:parent-style-name="Text_20_body">
      <style:text-properties officeooo:paragraph-rsid="00cc0494"/>
    </style:style>
    <style:style style:name="P33" style:family="paragraph" style:parent-style-name="Text_20_body">
      <style:text-properties officeooo:rsid="00cdcf95" officeooo:paragraph-rsid="00cdcf95"/>
    </style:style>
    <style:style style:name="P34" style:family="paragraph" style:parent-style-name="Text_20_body">
      <style:text-properties officeooo:rsid="00d155d0" officeooo:paragraph-rsid="00d155d0"/>
    </style:style>
    <style:style style:name="P35" style:family="paragraph" style:parent-style-name="Text_20_body">
      <style:text-properties officeooo:paragraph-rsid="00d30631"/>
    </style:style>
    <style:style style:name="P36" style:family="paragraph" style:parent-style-name="Text_20_body">
      <style:text-properties officeooo:rsid="00d4607d" officeooo:paragraph-rsid="00d4607d"/>
    </style:style>
    <style:style style:name="P37" style:family="paragraph" style:parent-style-name="Text_20_body">
      <style:text-properties officeooo:rsid="00d745e1" officeooo:paragraph-rsid="00d745e1"/>
    </style:style>
    <style:style style:name="P38" style:family="paragraph" style:parent-style-name="Text_20_body">
      <style:text-properties officeooo:rsid="00dea413" officeooo:paragraph-rsid="00dea413"/>
    </style:style>
    <style:style style:name="P39" style:family="paragraph" style:parent-style-name="Text_20_body">
      <style:text-properties officeooo:rsid="00906a9c" officeooo:paragraph-rsid="008e8ea4"/>
    </style:style>
    <style:style style:name="P40" style:family="paragraph" style:parent-style-name="Text_20_body">
      <style:text-properties officeooo:rsid="00d9170b" officeooo:paragraph-rsid="00d9170b"/>
    </style:style>
    <style:style style:name="P41" style:family="paragraph" style:parent-style-name="Text_20_body">
      <style:text-properties officeooo:rsid="00eaf986" officeooo:paragraph-rsid="00eaf986"/>
    </style:style>
    <style:style style:name="P42" style:family="paragraph" style:parent-style-name="Text_20_body">
      <style:text-properties officeooo:rsid="00ebd830" officeooo:paragraph-rsid="00ebd830"/>
    </style:style>
    <style:style style:name="P43" style:family="paragraph" style:parent-style-name="Text_20_body">
      <style:text-properties officeooo:rsid="00ed4761" officeooo:paragraph-rsid="00ee7049"/>
    </style:style>
    <style:style style:name="P44" style:family="paragraph" style:parent-style-name="Table_20_Heading">
      <style:text-properties officeooo:rsid="003779db" officeooo:paragraph-rsid="003b8fe9"/>
    </style:style>
    <style:style style:name="P45" style:family="paragraph" style:parent-style-name="Table_20_Heading">
      <style:text-properties officeooo:rsid="003b8fe9" officeooo:paragraph-rsid="003b8fe9"/>
    </style:style>
    <style:style style:name="P46" style:family="paragraph" style:parent-style-name="Table_20_Contents">
      <style:text-properties officeooo:rsid="003b8fe9" officeooo:paragraph-rsid="003b8fe9"/>
    </style:style>
    <style:style style:name="P47" style:family="paragraph" style:parent-style-name="Table_20_Contents">
      <style:text-properties officeooo:rsid="0098d8fe" officeooo:paragraph-rsid="0098d8fe"/>
    </style:style>
    <style:style style:name="P48" style:family="paragraph" style:parent-style-name="Table_20_Contents">
      <style:text-properties officeooo:rsid="0099d82b" officeooo:paragraph-rsid="0099d82b"/>
    </style:style>
    <style:style style:name="P49" style:family="paragraph" style:parent-style-name="Table_20_Contents">
      <style:text-properties officeooo:rsid="00a129df" officeooo:paragraph-rsid="00b1eef4"/>
    </style:style>
    <style:style style:name="P50" style:family="paragraph" style:parent-style-name="Table_20_Contents">
      <style:paragraph-properties fo:text-align="center" style:justify-single-word="false"/>
      <style:text-properties officeooo:rsid="00a129df" officeooo:paragraph-rsid="00b1eef4" style:font-size-asian="10.5pt" style:text-rotation-angle="90" style:text-rotation-scale="line-height"/>
    </style:style>
    <style:style style:name="P51" style:family="paragraph" style:parent-style-name="Table_20_Contents">
      <style:text-properties officeooo:rsid="00bf74d4" officeooo:paragraph-rsid="00bf74d4"/>
    </style:style>
    <style:style style:name="P52" style:family="paragraph" style:parent-style-name="Table_20_Contents">
      <style:text-properties officeooo:rsid="00bf74d4" officeooo:paragraph-rsid="00e435f6"/>
    </style:style>
    <style:style style:name="P53" style:family="paragraph" style:parent-style-name="Table_20_Contents">
      <style:paragraph-properties fo:text-align="center" style:justify-single-word="false"/>
      <style:text-properties officeooo:rsid="00e29846" officeooo:paragraph-rsid="00e29846"/>
    </style:style>
    <style:style style:name="P54" style:family="paragraph" style:parent-style-name="Subtitle">
      <style:text-properties officeooo:rsid="0098042e" officeooo:paragraph-rsid="0098042e"/>
    </style:style>
    <style:style style:name="P55" style:family="paragraph" style:parent-style-name="Text_20_body">
      <style:paragraph-properties fo:break-before="page"/>
      <style:text-properties officeooo:rsid="001a7088" officeooo:paragraph-rsid="001a7088"/>
    </style:style>
    <style:style style:name="P56" style:family="paragraph" style:parent-style-name="Contents_20_Heading">
      <style:paragraph-properties fo:break-before="page"/>
    </style:style>
    <style:style style:name="P57" style:family="paragraph" style:parent-style-name="Title">
      <style:text-properties officeooo:rsid="0098042e" officeooo:paragraph-rsid="0098042e"/>
    </style:style>
    <style:style style:name="P58" style:family="paragraph" style:parent-style-name="Quotations">
      <style:text-properties officeooo:paragraph-rsid="00b1eef4"/>
    </style:style>
    <style:style style:name="P59" style:family="paragraph" style:parent-style-name="Quotations">
      <style:text-properties fo:font-style="italic" officeooo:paragraph-rsid="0098d8fe" style:font-style-asian="italic" style:font-style-complex="italic"/>
    </style:style>
    <style:style style:name="P60" style:family="paragraph" style:parent-style-name="Quotations">
      <style:text-properties officeooo:rsid="00ebd830" officeooo:paragraph-rsid="00ebd830"/>
    </style:style>
    <style:style style:name="P61" style:family="paragraph" style:parent-style-name="Text_20_body">
      <style:paragraph-properties fo:margin-left="2.501cm" fo:margin-right="0cm" fo:text-indent="0cm" style:auto-text-indent="false"/>
      <style:text-properties fo:font-style="italic" officeooo:rsid="009c9412" officeooo:paragraph-rsid="00b1eef4" style:font-style-asian="italic" style:font-style-complex="italic"/>
    </style:style>
    <style:style style:name="P62" style:family="paragraph" style:parent-style-name="Text_20_body">
      <style:paragraph-properties fo:margin-left="3.752cm" fo:margin-right="0cm" fo:text-indent="0cm" style:auto-text-indent="false"/>
      <style:text-properties fo:font-style="italic" style:font-style-asian="italic" style:font-style-complex="italic"/>
    </style:style>
    <style:style style:name="P63" style:family="paragraph" style:parent-style-name="Text_20_body">
      <style:paragraph-properties fo:margin-left="3.752cm" fo:margin-right="0cm" fo:text-indent="0cm" style:auto-text-indent="false"/>
      <style:text-properties fo:font-style="italic" officeooo:rsid="009c9412" officeooo:paragraph-rsid="00b1eef4" style:font-style-asian="italic" style:font-style-complex="italic"/>
    </style:style>
    <style:style style:name="P64" style:family="paragraph" style:parent-style-name="Text_20_body">
      <style:paragraph-properties fo:margin-left="3.752cm" fo:margin-right="0cm" fo:text-indent="0cm" style:auto-text-indent="false"/>
      <style:text-properties fo:font-style="italic" officeooo:rsid="009c9412" officeooo:paragraph-rsid="00e7d801" style:font-style-asian="italic" style:font-style-complex="italic"/>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Bibliography_20_1">
      <style:paragraph-properties>
        <style:tab-stops/>
      </style:paragraph-properties>
    </style:style>
    <style:style style:name="P70" style:family="paragraph" style:parent-style-name="Contents_20_5">
      <style:paragraph-properties>
        <style:tab-stops>
          <style:tab-stop style:position="15.004cm" style:type="right" style:leader-style="dotted" style:leader-text="."/>
        </style:tab-stops>
      </style:paragraph-properties>
    </style:style>
    <style:style style:name="P71" style:family="paragraph" style:parent-style-name="Text_20_body" style:list-style-name="L1">
      <style:text-properties officeooo:rsid="003b8fe9" officeooo:paragraph-rsid="003fe4ed"/>
    </style:style>
    <style:style style:name="P72" style:family="paragraph" style:parent-style-name="Text_20_body" style:list-style-name="L1">
      <style:text-properties officeooo:rsid="003b8fe9" officeooo:paragraph-rsid="00922ed1"/>
    </style:style>
    <style:style style:name="P73" style:family="paragraph" style:parent-style-name="Text_20_body" style:list-style-name="L1">
      <style:text-properties officeooo:rsid="0099d82b" officeooo:paragraph-rsid="0099d82b"/>
    </style:style>
    <style:style style:name="P74" style:family="paragraph" style:parent-style-name="Text_20_body" style:list-style-name="L1">
      <style:text-properties officeooo:rsid="009c9412" officeooo:paragraph-rsid="009c9412"/>
    </style:style>
    <style:style style:name="P75" style:family="paragraph" style:parent-style-name="Text_20_body" style:list-style-name="L6">
      <style:text-properties officeooo:rsid="009c9412" officeooo:paragraph-rsid="00b1eef4"/>
    </style:style>
    <style:style style:name="P76" style:family="paragraph" style:parent-style-name="Text_20_body" style:list-style-name="L7">
      <style:text-properties officeooo:rsid="009c9412" officeooo:paragraph-rsid="009c9412"/>
    </style:style>
    <style:style style:name="P77" style:family="paragraph" style:parent-style-name="Text_20_body" style:list-style-name="L11">
      <style:text-properties officeooo:rsid="009c9412" officeooo:paragraph-rsid="009c9412"/>
    </style:style>
    <style:style style:name="P78" style:family="paragraph" style:parent-style-name="Text_20_body" style:list-style-name="L14">
      <style:text-properties officeooo:rsid="009c9412" officeooo:paragraph-rsid="009c9412"/>
    </style:style>
    <style:style style:name="P79" style:family="paragraph" style:parent-style-name="Text_20_body" style:list-style-name="L21">
      <style:text-properties officeooo:rsid="009c9412" officeooo:paragraph-rsid="00e5fc2b"/>
    </style:style>
    <style:style style:name="P80" style:family="paragraph" style:parent-style-name="Text_20_body" style:list-style-name="L25">
      <style:text-properties officeooo:rsid="009c9412" officeooo:paragraph-rsid="00ee7049"/>
    </style:style>
    <style:style style:name="P81" style:family="paragraph" style:parent-style-name="Text_20_body" style:list-style-name="L4">
      <style:text-properties officeooo:rsid="009e1d0e" officeooo:paragraph-rsid="009e1d0e"/>
    </style:style>
    <style:style style:name="P82" style:family="paragraph" style:parent-style-name="Text_20_body" style:list-style-name="L4">
      <style:text-properties fo:font-style="normal" officeooo:rsid="009e1d0e" officeooo:paragraph-rsid="009e1d0e" style:font-style-asian="normal" style:font-style-complex="normal"/>
    </style:style>
    <style:style style:name="P83" style:family="paragraph" style:parent-style-name="Text_20_body" style:list-style-name="L4">
      <style:text-properties fo:font-style="normal" officeooo:rsid="009f7f63" officeooo:paragraph-rsid="009f7f63" style:font-style-asian="normal" style:font-style-complex="normal"/>
    </style:style>
    <style:style style:name="P84" style:family="paragraph" style:parent-style-name="Text_20_body" style:list-style-name="L5">
      <style:text-properties fo:font-style="normal" officeooo:rsid="009f7f63" officeooo:paragraph-rsid="009f7f63" style:font-style-asian="normal" style:font-style-complex="normal"/>
    </style:style>
    <style:style style:name="P85" style:family="paragraph" style:parent-style-name="Text_20_body" style:list-style-name="L5">
      <style:text-properties fo:font-style="normal" officeooo:rsid="009f978f" officeooo:paragraph-rsid="009f978f" style:font-style-asian="normal" style:font-style-complex="normal"/>
    </style:style>
    <style:style style:name="P86" style:family="paragraph" style:parent-style-name="Text_20_body" style:list-style-name="L5">
      <style:text-properties fo:font-style="normal" officeooo:rsid="00a0715b" officeooo:paragraph-rsid="00a0715b" style:font-style-asian="normal" style:font-style-complex="normal"/>
    </style:style>
    <style:style style:name="P87" style:family="paragraph" style:parent-style-name="Text_20_body" style:list-style-name="L6">
      <style:text-properties officeooo:paragraph-rsid="00b1eef4"/>
    </style:style>
    <style:style style:name="P88" style:family="paragraph" style:parent-style-name="Text_20_body" style:list-style-name="L8">
      <style:text-properties officeooo:rsid="00ed4761" officeooo:paragraph-rsid="00ee7049"/>
    </style:style>
    <style:style style:name="P89" style:family="paragraph" style:parent-style-name="Text_20_body" style:list-style-name="L9">
      <style:text-properties officeooo:rsid="00ba44bc" officeooo:paragraph-rsid="00ba44bc"/>
    </style:style>
    <style:style style:name="P90" style:family="paragraph" style:parent-style-name="Text_20_body" style:list-style-name="L9">
      <style:text-properties officeooo:rsid="00bcaf7a" officeooo:paragraph-rsid="00bcaf7a"/>
    </style:style>
    <style:style style:name="P91" style:family="paragraph" style:parent-style-name="Text_20_body" style:list-style-name="L10">
      <style:text-properties officeooo:rsid="00bcaf7a" officeooo:paragraph-rsid="00bcaf7a"/>
    </style:style>
    <style:style style:name="P92" style:family="paragraph" style:parent-style-name="Text_20_body" style:list-style-name="L19">
      <style:text-properties officeooo:rsid="00bcaf7a" officeooo:paragraph-rsid="00dea413"/>
    </style:style>
    <style:style style:name="P93" style:family="paragraph" style:parent-style-name="Text_20_body" style:list-style-name="L12">
      <style:text-properties officeooo:rsid="00bfe952" officeooo:paragraph-rsid="00bfe952"/>
    </style:style>
    <style:style style:name="P94" style:family="paragraph" style:parent-style-name="Text_20_body" style:list-style-name="L13">
      <style:text-properties officeooo:rsid="00bfe952" officeooo:paragraph-rsid="00bfe952"/>
    </style:style>
    <style:style style:name="P95" style:family="paragraph" style:parent-style-name="Text_20_body" style:list-style-name="L15">
      <style:text-properties officeooo:paragraph-rsid="00ca0806"/>
    </style:style>
    <style:style style:name="P96" style:family="paragraph" style:parent-style-name="Text_20_body" style:list-style-name="L15">
      <style:text-properties officeooo:rsid="00ca0806" officeooo:paragraph-rsid="00ca0806"/>
    </style:style>
    <style:style style:name="P97" style:family="paragraph" style:parent-style-name="Text_20_body" style:list-style-name="L15">
      <style:text-properties officeooo:rsid="00ca0806" officeooo:paragraph-rsid="00e4f404"/>
    </style:style>
    <style:style style:name="P98" style:family="paragraph" style:parent-style-name="Text_20_body" style:list-style-name="L15">
      <style:text-properties officeooo:rsid="00ca0806" officeooo:paragraph-rsid="00cb7a11"/>
    </style:style>
    <style:style style:name="P99" style:family="paragraph" style:parent-style-name="Text_20_body" style:list-style-name="L16">
      <style:text-properties officeooo:rsid="00cfccaf" officeooo:paragraph-rsid="00cfccaf"/>
    </style:style>
    <style:style style:name="P100" style:family="paragraph" style:parent-style-name="Text_20_body" style:list-style-name="L17">
      <style:text-properties officeooo:rsid="00d4607d" officeooo:paragraph-rsid="00d4607d"/>
    </style:style>
    <style:style style:name="P101" style:family="paragraph" style:parent-style-name="Text_20_body" style:list-style-name="L17">
      <style:text-properties officeooo:rsid="00d5b906" officeooo:paragraph-rsid="00d5b906"/>
    </style:style>
    <style:style style:name="P102" style:family="paragraph" style:parent-style-name="Text_20_body" style:list-style-name="L18">
      <style:text-properties officeooo:rsid="00d745e1" officeooo:paragraph-rsid="00d745e1"/>
    </style:style>
    <style:style style:name="P103" style:family="paragraph" style:parent-style-name="Text_20_body" style:list-style-name="L18">
      <style:text-properties officeooo:rsid="00d8256b" officeooo:paragraph-rsid="00d8256b"/>
    </style:style>
    <style:style style:name="P104" style:family="paragraph" style:parent-style-name="Text_20_body" style:list-style-name="L19">
      <style:text-properties officeooo:paragraph-rsid="00dea413"/>
    </style:style>
    <style:style style:name="P105" style:family="paragraph" style:parent-style-name="Text_20_body" style:list-style-name="L20">
      <style:text-properties fo:font-style="italic" officeooo:rsid="009c9412" officeooo:paragraph-rsid="00e5fc2b" style:font-style-asian="italic" style:font-style-complex="italic"/>
    </style:style>
    <style:style style:name="P106" style:family="paragraph" style:parent-style-name="Text_20_body" style:list-style-name="L22">
      <style:text-properties fo:font-style="italic" officeooo:rsid="009c9412" officeooo:paragraph-rsid="00b1eef4" style:font-style-asian="italic" style:font-style-complex="italic"/>
    </style:style>
    <style:style style:name="P107" style:family="paragraph" style:parent-style-name="Text_20_body" style:list-style-name="L22">
      <style:text-properties fo:font-style="italic" officeooo:rsid="009c9412" officeooo:paragraph-rsid="00e5fc2b" style:font-style-asian="italic" style:font-style-complex="italic"/>
    </style:style>
    <style:style style:name="P108" style:family="paragraph" style:parent-style-name="Text_20_body" style:list-style-name="L23">
      <style:text-properties fo:font-style="italic" officeooo:rsid="009c9412" officeooo:paragraph-rsid="00b1eef4" style:font-style-asian="italic" style:font-style-complex="italic"/>
    </style:style>
    <style:style style:name="P109" style:family="paragraph" style:parent-style-name="Text_20_body" style:list-style-name="L23">
      <style:text-properties fo:font-style="italic" officeooo:rsid="009c9412" officeooo:paragraph-rsid="00e5fc2b" style:font-style-asian="italic" style:font-style-complex="italic"/>
    </style:style>
    <style:style style:name="P110" style:family="paragraph" style:parent-style-name="Text_20_body" style:list-style-name="L24">
      <style:text-properties officeooo:rsid="00ebd830" officeooo:paragraph-rsid="00ebd830"/>
    </style:style>
    <style:style style:name="P111" style:family="paragraph" style:parent-style-name="Text_20_body" style:list-style-name="L25">
      <style:text-properties officeooo:rsid="00b8f64e" officeooo:paragraph-rsid="00ee7049"/>
    </style:style>
    <style:style style:name="P112" style:family="paragraph" style:parent-style-name="Text_20_body" style:list-style-name="L10">
      <style:text-properties officeooo:rsid="00f357ca" officeooo:paragraph-rsid="00f357ca"/>
    </style:style>
    <style:style style:name="P113" style:family="paragraph" style:parent-style-name="Text_20_body" style:list-style-name="L26">
      <style:text-properties officeooo:rsid="00f6967d" officeooo:paragraph-rsid="00f6967d"/>
    </style:style>
    <style:style style:name="P114" style:family="paragraph" style:parent-style-name="Text_20_body" style:list-style-name="L27">
      <style:text-properties officeooo:rsid="00f6967d" officeooo:paragraph-rsid="00f6967d"/>
    </style:style>
    <style:style style:name="P115" style:family="paragraph" style:parent-style-name="Text_20_body" style:list-style-name="L19">
      <style:paragraph-properties fo:margin-top="0cm" fo:margin-bottom="0cm" loext:contextual-spacing="false"/>
      <style:text-properties officeooo:paragraph-rsid="00dea413"/>
    </style:style>
    <style:style style:name="P116" style:family="paragraph" style:parent-style-name="Heading_20_2">
      <style:text-properties officeooo:paragraph-rsid="00adfc30"/>
    </style:style>
    <style:style style:name="P117" style:family="paragraph" style:parent-style-name="Heading_20_2">
      <style:text-properties officeooo:rsid="00b8f64e" officeooo:paragraph-rsid="00b8f64e"/>
    </style:style>
    <style:style style:name="P118" style:family="paragraph" style:parent-style-name="Heading_20_2">
      <style:text-properties officeooo:paragraph-rsid="00ba44bc"/>
    </style:style>
    <style:style style:name="P119" style:family="paragraph" style:parent-style-name="Heading_20_2">
      <style:text-properties officeooo:rsid="00bfe952" officeooo:paragraph-rsid="00bfe952"/>
    </style:style>
    <style:style style:name="P120" style:family="paragraph" style:parent-style-name="Heading_20_1">
      <style:text-properties officeooo:rsid="003b51c6" officeooo:paragraph-rsid="003b51c6"/>
    </style:style>
    <style:style style:name="P121" style:family="paragraph" style:parent-style-name="Heading_20_1" style:list-style-nam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099d82b" officeooo:paragraph-rsid="0099d82b"/>
    </style:style>
    <style:style style:name="P124" style:family="paragraph" style:parent-style-name="Heading_20_3">
      <style:text-properties officeooo:paragraph-rsid="003b8fe9"/>
    </style:style>
    <style:style style:name="P125" style:family="paragraph" style:parent-style-name="Heading_20_3">
      <style:text-properties officeooo:rsid="008e8ea4" officeooo:paragraph-rsid="008e8ea4"/>
    </style:style>
    <style:style style:name="P126" style:family="paragraph" style:parent-style-name="Heading_20_3">
      <style:text-properties officeooo:paragraph-rsid="004e3ae8"/>
    </style:style>
    <style:style style:name="P127" style:family="paragraph" style:parent-style-name="Heading_20_3">
      <style:text-properties officeooo:rsid="00cc0494" officeooo:paragraph-rsid="00cc0494"/>
    </style:style>
    <style:style style:name="P128" style:family="paragraph" style:parent-style-name="Heading_20_3">
      <style:text-properties officeooo:rsid="00b9f847" officeooo:paragraph-rsid="00d30631"/>
    </style:style>
    <style:style style:name="P129" style:family="paragraph" style:parent-style-name="Heading_20_3">
      <style:text-properties officeooo:rsid="00f6967d" officeooo:paragraph-rsid="00f6967d"/>
    </style:style>
    <style:style style:name="P130" style:family="paragraph" style:parent-style-name="Heading_20_4">
      <style:text-properties officeooo:paragraph-rsid="00e4f404"/>
    </style:style>
    <style:style style:name="P131" style:family="paragraph" style:parent-style-name="Heading_20_4">
      <style:text-properties officeooo:paragraph-rsid="00e29846"/>
    </style:style>
    <style:style style:name="P132" style:family="paragraph" style:parent-style-name="Heading_20_4">
      <style:text-properties officeooo:paragraph-rsid="00b1eef4"/>
    </style:style>
    <style:style style:name="P133" style:family="paragraph" style:parent-style-name="Table_20_Contents" style:list-style-name="L2">
      <style:text-properties officeooo:rsid="0099d82b" officeooo:paragraph-rsid="0099d82b"/>
    </style:style>
    <style:style style:name="P134" style:family="paragraph" style:parent-style-name="Table_20_Contents" style:list-style-name="L3">
      <style:text-properties officeooo:rsid="0099d82b" officeooo:paragraph-rsid="0099d82b"/>
    </style:style>
    <style:style style:name="P135" style:family="paragraph" style:parent-style-name="Table_20_Contents" style:list-style-name="L3">
      <style:text-properties officeooo:rsid="00a95f2f" officeooo:paragraph-rsid="00a95f2f"/>
    </style:style>
    <style:style style:name="P136" style:family="paragraph" style:parent-style-name="Table_20_Contents" style:list-style-name="L3">
      <style:text-properties officeooo:rsid="00ad9fb6" officeooo:paragraph-rsid="00ad9fb6"/>
    </style:style>
    <style:style style:name="P137" style:family="paragraph" style:parent-style-name="Heading_20_5">
      <style:text-properties officeooo:paragraph-rsid="00b1eef4"/>
    </style:style>
    <style:style style:name="T1" style:family="text">
      <style:text-properties officeooo:rsid="003b8fe9"/>
    </style:style>
    <style:style style:name="T2" style:family="text">
      <style:text-properties officeooo:rsid="003fe4ed"/>
    </style:style>
    <style:style style:name="T3" style:family="text">
      <style:text-properties officeooo:rsid="0077ec05"/>
    </style:style>
    <style:style style:name="T4" style:family="text">
      <style:text-properties fo:font-weight="bold" style:font-weight-asian="bold" style:font-weight-complex="bold"/>
    </style:style>
    <style:style style:name="T5" style:family="text">
      <style:text-properties officeooo:rsid="0098042e"/>
    </style:style>
    <style:style style:name="T6" style:family="text">
      <style:text-properties officeooo:rsid="0098d8fe"/>
    </style:style>
    <style:style style:name="T7" style:family="text">
      <style:text-properties fo:font-style="italic" style:font-style-asian="italic" style:font-style-complex="italic"/>
    </style:style>
    <style:style style:name="T8" style:family="text">
      <style:text-properties fo:font-style="italic" officeooo:rsid="009c9412" style:font-style-asian="italic" style:font-style-complex="italic"/>
    </style:style>
    <style:style style:name="T9" style:family="text">
      <style:text-properties fo:font-style="italic" officeooo:rsid="00a129df" style:font-style-asian="italic" style:font-style-complex="italic"/>
    </style:style>
    <style:style style:name="T10" style:family="text">
      <style:text-properties fo:font-style="italic" officeooo:rsid="00cb7a11" style:font-style-asian="italic" style:font-style-complex="italic"/>
    </style:style>
    <style:style style:name="T11" style:family="text">
      <style:text-properties fo:font-style="italic" officeooo:rsid="00d34925" style:font-style-asian="italic" style:font-style-complex="italic"/>
    </style:style>
    <style:style style:name="T12" style:family="text">
      <style:text-properties fo:font-style="italic" officeooo:rsid="00e29846" style:font-style-asian="italic" style:font-style-complex="italic"/>
    </style:style>
    <style:style style:name="T13" style:family="text">
      <style:text-properties fo:font-style="italic" fo:font-weight="normal" officeooo:rsid="00c8c995" style:font-style-asian="italic" style:font-weight-asian="normal" style:font-style-complex="italic" style:font-weight-complex="normal"/>
    </style:style>
    <style:style style:name="T14" style:family="text">
      <style:text-properties officeooo:rsid="009b8061"/>
    </style:style>
    <style:style style:name="T15" style:family="text">
      <style:text-properties officeooo:rsid="009c9412"/>
    </style:style>
    <style:style style:name="T16" style:family="text">
      <style:text-properties officeooo:rsid="009f7f63"/>
    </style:style>
    <style:style style:name="T17" style:family="text">
      <style:text-properties fo:font-weight="normal" style:font-weight-asian="normal" style:font-weight-complex="normal"/>
    </style:style>
    <style:style style:name="T18" style:family="text">
      <style:text-properties fo:font-weight="normal" officeooo:rsid="00a0715b" style:font-weight-asian="normal" style:font-weight-complex="normal"/>
    </style:style>
    <style:style style:name="T19" style:family="text">
      <style:text-properties fo:font-weight="normal" officeooo:rsid="00c8c995" style:font-weight-asian="normal" style:font-weight-complex="normal"/>
    </style:style>
    <style:style style:name="T20" style:family="text">
      <style:text-properties fo:font-weight="normal" officeooo:rsid="00e435f6" style:font-weight-asian="normal" style:font-weight-complex="normal"/>
    </style:style>
    <style:style style:name="T21" style:family="text">
      <style:text-properties officeooo:rsid="00a129df"/>
    </style:style>
    <style:style style:name="T22" style:family="text">
      <style:text-properties officeooo:rsid="00a2f7b3"/>
    </style:style>
    <style:style style:name="T23" style:family="text">
      <style:text-properties officeooo:rsid="00a50b22"/>
    </style:style>
    <style:style style:name="T24" style:family="text">
      <style:text-properties officeooo:rsid="00a8fc02"/>
    </style:style>
    <style:style style:name="T25" style:family="text">
      <style:text-properties officeooo:rsid="00a95f2f"/>
    </style:style>
    <style:style style:name="T26" style:family="text">
      <style:text-properties officeooo:rsid="00adfc30"/>
    </style:style>
    <style:style style:name="T27" style:family="text">
      <style:text-properties officeooo:rsid="00aeb305"/>
    </style:style>
    <style:style style:name="T28" style:family="text">
      <style:text-properties officeooo:rsid="00b0a32f"/>
    </style:style>
    <style:style style:name="T29" style:family="text">
      <style:text-properties officeooo:rsid="00b1eef4"/>
    </style:style>
    <style:style style:name="T30" style:family="text">
      <style:text-properties officeooo:rsid="00b284e5"/>
    </style:style>
    <style:style style:name="T31" style:family="text">
      <style:text-properties officeooo:rsid="00b698d2"/>
    </style:style>
    <style:style style:name="T32" style:family="text">
      <style:text-properties officeooo:rsid="00b74f3a"/>
    </style:style>
    <style:style style:name="T33" style:family="text">
      <style:text-properties officeooo:rsid="00b84ad7"/>
    </style:style>
    <style:style style:name="T34" style:family="text">
      <style:text-properties officeooo:rsid="00b9f847"/>
    </style:style>
    <style:style style:name="T35" style:family="text">
      <style:text-properties officeooo:rsid="00bc1a36"/>
    </style:style>
    <style:style style:name="T36" style:family="text">
      <style:text-properties officeooo:rsid="00bcaf7a"/>
    </style:style>
    <style:style style:name="T37" style:family="text">
      <style:text-properties officeooo:rsid="00bda4b9"/>
    </style:style>
    <style:style style:name="T38" style:family="text">
      <style:text-properties officeooo:rsid="00bf74d4"/>
    </style:style>
    <style:style style:name="T39" style:family="text">
      <style:text-properties officeooo:rsid="00bfe952"/>
    </style:style>
    <style:style style:name="T40" style:family="text">
      <style:text-properties officeooo:rsid="00c217b6"/>
    </style:style>
    <style:style style:name="T41" style:family="text">
      <style:text-properties officeooo:rsid="00c5aa8d"/>
    </style:style>
    <style:style style:name="T42" style:family="text">
      <style:text-properties officeooo:rsid="00c65dbf"/>
    </style:style>
    <style:style style:name="T43" style:family="text">
      <style:text-properties officeooo:rsid="00c8c995"/>
    </style:style>
    <style:style style:name="T44" style:family="text">
      <style:text-properties officeooo:rsid="00ca0806"/>
    </style:style>
    <style:style style:name="T45" style:family="text">
      <style:text-properties officeooo:rsid="00cadd48"/>
    </style:style>
    <style:style style:name="T46" style:family="text">
      <style:text-properties officeooo:rsid="00cb7a11"/>
    </style:style>
    <style:style style:name="T47" style:family="text">
      <style:text-properties officeooo:rsid="00cdcf95"/>
    </style:style>
    <style:style style:name="T48" style:family="text">
      <style:text-properties officeooo:rsid="00cfccaf"/>
    </style:style>
    <style:style style:name="T49" style:family="text">
      <style:text-properties officeooo:rsid="00d5b906"/>
    </style:style>
    <style:style style:name="T50" style:family="text">
      <style:text-properties officeooo:rsid="00d63289"/>
    </style:style>
    <style:style style:name="T51" style:family="text">
      <style:text-properties officeooo:rsid="00d9170b"/>
    </style:style>
    <style:style style:name="T52" style:family="text">
      <style:text-properties officeooo:rsid="00da28a2"/>
    </style:style>
    <style:style style:name="T53" style:family="text">
      <style:text-properties officeooo:rsid="00db49a4"/>
    </style:style>
    <style:style style:name="T54" style:family="text">
      <style:text-properties officeooo:rsid="00e29846"/>
    </style:style>
    <style:style style:name="T55" style:family="text">
      <style:text-properties officeooo:rsid="00e4f404"/>
    </style:style>
    <style:style style:name="T56" style:family="text">
      <style:text-properties officeooo:rsid="00e5fc2b"/>
    </style:style>
    <style:style style:name="T57" style:family="text">
      <style:text-properties officeooo:rsid="00e75f0e"/>
    </style:style>
    <style:style style:name="T58" style:family="text">
      <style:text-properties officeooo:rsid="00e9a8e5"/>
    </style:style>
    <style:style style:name="T59" style:family="text">
      <style:text-properties officeooo:rsid="00ea95a9"/>
    </style:style>
    <style:style style:name="T60" style:family="text">
      <style:text-properties officeooo:rsid="00eaf986"/>
    </style:style>
    <style:style style:name="T61" style:family="text">
      <style:text-properties officeooo:rsid="00ed4761"/>
    </style:style>
    <style:style style:name="T62" style:family="text">
      <style:text-properties officeooo:rsid="00ee7049"/>
    </style:style>
    <style:style style:name="T63" style:family="text">
      <style:text-properties officeooo:rsid="00f0dd42"/>
    </style:style>
    <style:style style:name="T64" style:family="text">
      <style:text-properties officeooo:rsid="00f6967d"/>
    </style:style>
    <style:style style:name="T65" style:family="text">
      <style:text-properties officeooo:rsid="00f6b319"/>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esarrollo de Aplicaciones Seguros</text:p>
      <text:p text:style-name="P54"><text:bookmark-start text:name="__RefHeading__740_1503574031"/>Aplicaciones WEB-Móviles<text:bookmark-end text:name="__RefHeading__740_1503574031"/></text:p>
      <text:h text:style-name="P120" text:outline-level="1"><text:bookmark-start text:name="__RefHeading__1908_1276364847"/>Introducción<text:bookmark-end text:name="__RefHeading__1908_1276364847"/></text:h>
      <text:p text:style-name="P5">El Área de Desarrollo Web – Móvil<text:span text:style-name="T2">, </text:span>como parte de sus desarrollos requiere <text:span text:style-name="T5">de lineamientos de seguridad para garantizar la información privada de los socios, el ingreso indebido a la información, ataques a los sitios de la institución y el cumplimiento de normativas de los organismos de control.</text:span></text:p>
      <text:h text:style-name="Heading_20_3" text:outline-level="3"><text:bookmark-start text:name="__RefHeading__1910_1276364847"/>Sobre el documento<text:bookmark-end text:name="__RefHeading__1910_1276364847"/></text:h>
      <text:p text:style-name="P6">Para el entendimiento del documento <text:span text:style-name="T1">este se presenta en 4 secciones: </text:span></text:p>
      <text:list xml:id="list1104559875" text:style-name="L1">
        <text:list-item>
          <text:p text:style-name="P71"><text:span text:style-name="T40">L</text:span>a introductoria, </text:p>
        </text:list-item>
        <text:list-item>
          <text:p text:style-name="P73">Principios para un desarrollo seguro, <text:span text:style-name="T14">Pág.: </text:span><text:bookmark-ref text:reference-format="page" text:ref-name="__RefHeading__1932_1276364847">3</text:bookmark-ref><text:s/><text:bookmark-ref text:reference-format="text" text:ref-name="__RefHeading__1932_1276364847">Principios del desarrollo seguro, aplicaciones de escritorio, Web y Móviles [1]</text:bookmark-ref></text:p>
        </text:list-item>
        <text:list-item>
          <text:p text:style-name="P72"><text:span text:style-name="T15">OWASP ver Pág: </text:span><text:span text:style-name="T15"><text:bookmark-ref text:reference-format="page" text:ref-name="__RefHeading__2087_552988821">5</text:bookmark-ref></text:span><text:span text:style-name="T15"><text:s/></text:span><text:span text:style-name="T15"><text:bookmark-ref text:reference-format="text" text:ref-name="__RefHeading__2087_552988821">Recomendaciones OWASP para el desarrollo web [2] </text:bookmark-ref></text:span></text:p>
        </text:list-item>
        <text:list-item>
          <text:p text:style-name="P74"><text:span text:style-name="T42">De la retorica a la acción</text:span>, ver Pág: <text:bookmark-ref text:reference-format="page" text:ref-name="__RefHeading___Toc3572_1328538540">9</text:bookmark-ref><text:s/><text:bookmark-ref text:reference-format="text" text:ref-name="__RefHeading___Toc3572_1328538540">Ejemplos y aplicación de recomendaciones</text:bookmark-ref></text:p>
        </text:list-item>
      </text:list>
      <text:h text:style-name="Heading_20_3" text:outline-level="3"><text:bookmark-start text:name="__RefHeading__2177_552988821"/>Sobre la aplicación de este documento<text:bookmark-end text:name="__RefHeading__2177_552988821"/></text:h>
      <text:p text:style-name="P40">Tomar en cuenta:</text:p>
      <text:p text:style-name="P59">“<text:span text:style-name="T51">El desarrollo de aplicaciones es parte ciencia, parte arte, aveces mas arte que ciencia</text:span>” <text:span text:style-name="T51">y </text:span>“<text:span text:style-name="T51">En temas de seguridad, entra mucha malicia</text:span>”</text:p>
      <text:p text:style-name="Text_20_body">Por <text:span text:style-name="T3">tal motivo al aplicar este documento, usar el sentido común y si se tiene dudas. Por favor consulte.</text:span></text:p>
      <text:h text:style-name="P124" text:outline-level="3"><text:bookmark-start text:name="__RefHeading__1928_1276364847"/>Lista de acrónimos:<text:bookmark-end text:name="__RefHeading__1928_1276364847"/></text:h>
      <table:table table:name="Tabla1" table:style-name="Tabla1">
        <table:table-column table:style-name="Tabla1.A"/>
        <table:table-column table:style-name="Tabla1.B"/>
        <table:table-header-rows>
          <table:table-row>
            <table:table-cell table:style-name="Tabla1.A1" office:value-type="string">
              <text:p text:style-name="P44">Acrónimo </text:p>
            </table:table-cell>
            <table:table-cell table:style-name="Tabla1.B1" office:value-type="string">
              <text:p text:style-name="P45">Descripción</text:p>
            </table:table-cell>
          </table:table-row>
        </table:table-header-rows>
        <table:table-row>
          <table:table-cell table:style-name="Tabla1.A2" office:value-type="string">
            <text:p text:style-name="P47">OWASP</text:p>
          </table:table-cell>
          <table:table-cell table:style-name="Tabla1.B2" office:value-type="string">
            <text:p text:style-name="P47">Open Web Application Security Project</text:p>
          </table:table-cell>
        </table:table-row>
        <table:table-row>
          <table:table-cell table:style-name="Tabla1.A2" office:value-type="string">
            <text:p text:style-name="Table_20_Contents">CSRF</text:p>
          </table:table-cell>
          <table:table-cell table:style-name="Tabla1.B2" office:value-type="string">
            <text:p text:style-name="Table_20_Contents"><text:s/><text:span text:style-name="T6">Cross Site Request Forgery </text:span></text:p>
          </table:table-cell>
        </table:table-row>
        <table:table-row>
          <table:table-cell table:style-name="Tabla1.A2" office:value-type="string">
            <text:p text:style-name="P52">HTTP</text:p>
          </table:table-cell>
          <table:table-cell table:style-name="Tabla1.B2" office:value-type="string">
            <text:p text:style-name="P52">Hypertext Transfer Protocol</text:p>
          </table:table-cell>
        </table:table-row>
        <table:table-row>
          <table:table-cell table:style-name="Tabla1.A2" office:value-type="string">
            <text:p text:style-name="P51"/>
          </table:table-cell>
          <table:table-cell table:style-name="Tabla1.B2" office:value-type="string">
            <text:p text:style-name="P51"/>
          </table:table-cell>
        </table:table-row>
      </table:table>
      <text:h text:style-name="P125" text:outline-level="3"><text:bookmark-start text:name="__RefHeading___Toc3201_1328538540"/>Terminología<text:bookmark-end text:name="__RefHeading___Toc3201_1328538540"/></text:h>
      <text:p text:style-name="P39"/>
      <text:h text:style-name="P126" text:outline-level="3"><text:bookmark-start text:name="__RefHeading__1930_1276364847"/><text:soft-page-break/><text:span text:style-name="T1">Cambio de </text:span>Versi<text:span text:style-name="T1">ó</text:span>n<text:bookmark-end text:name="__RefHeading__1930_1276364847"/></text:h>
      <table:table table:name="Tabla2" table:style-name="Tabla2">
        <table:table-column table:style-name="Tabla2.A"/>
        <table:table-column table:style-name="Tabla2.B"/>
        <table:table-header-rows>
          <table:table-row>
            <table:table-cell table:style-name="Tabla2.A1" office:value-type="string">
              <text:p text:style-name="P45">Fecha</text:p>
              <text:p text:style-name="P44"><text:span text:style-name="T1">Versión</text:span> </text:p>
            </table:table-cell>
            <table:table-cell table:style-name="Tabla2.B1" office:value-type="string">
              <text:p text:style-name="P45">Descripción</text:p>
            </table:table-cell>
          </table:table-row>
        </table:table-header-rows>
        <table:table-row>
          <table:table-cell table:style-name="Tabla2.A2" office:value-type="string">
            <text:p text:style-name="P46">201<text:span text:style-name="T6">4-09-26</text:span></text:p>
          </table:table-cell>
          <table:table-cell table:style-name="Tabla2.B2" office:value-type="string">
            <text:p text:style-name="P47">Adriana Pazmiño:</text:p>
            <text:p text:style-name="P48">Emisión Inicial del Documento</text:p>
          </table:table-cell>
        </table:table-row>
        <table:table-row>
          <table:table-cell table:style-name="Tabla2.A2" office:value-type="string">
            <text:p text:style-name="P46">201<text:span text:style-name="T6">4-09-26</text:span></text:p>
          </table:table-cell>
          <table:table-cell table:style-name="Tabla2.B2" office:value-type="string">
            <text:p text:style-name="P47">Marco Paredes, Santiago Vázquez, Verónica Vélez, Manuel Cartuche y Santiago Araujo:</text:p>
            <text:p text:style-name="P48">Revisión del documento en reunión</text:p>
          </table:table-cell>
        </table:table-row>
        <table:table-row>
          <table:table-cell table:style-name="Tabla2.A2" office:value-type="string">
            <text:p text:style-name="P48">2016-03-<text:span text:style-name="T25">16</text:span></text:p>
          </table:table-cell>
          <table:table-cell table:style-name="Tabla2.B2" office:value-type="string">
            <text:p text:style-name="P48">Omar Vélez: </text:p>
            <text:list xml:id="list2898618968" text:style-name="L2">
              <text:list-item>
                <text:p text:style-name="P133">Agregado de Introducción</text:p>
              </text:list-item>
            </text:list>
            <text:list xml:id="list3570489241" text:style-name="L3">
              <text:list-item>
                <text:p text:style-name="P134">Agregado Lista de Acrónimos</text:p>
              </text:list-item>
              <text:list-item>
                <text:p text:style-name="P135">Agregado Principios de Desarrollo Seguro</text:p>
              </text:list-item>
              <text:list-item>
                <text:p text:style-name="P135">Cambios OWASP <text:span text:style-name="T32">ampliación de documento anterior</text:span></text:p>
              </text:list-item>
              <text:list-item>
                <text:p text:style-name="P135">Agregado Ejemplos de aplicación</text:p>
              </text:list-item>
              <text:list-item>
                <text:p text:style-name="P136">Paso de Referencias a Biografiás</text:p>
              </text:list-item>
            </text:list>
          </table:table-cell>
        </table:table-row>
      </table:table>
      <text:h text:style-name="P121" text:outline-level="1"/>
      <text:h text:style-name="P123" text:outline-level="1"><text:bookmark-start text:name="__RefHeading__1932_1276364847"/>Principios del desarrollo seguro, <text:span text:style-name="T30">aplicaciones de escritorio, Web y Móviles </text:span><text:span text:style-name="T30"><text:bibliography-mark text:identifier="PRI001" text:bibliography-type="www" text:author=" Camilo Gutiérrez Amaya" text:month="02" text:title="Los 10 principios básicos para un desarrollo seguro" text:year="2014" text:url="http://www.welivesecurity.com/la-es/2014/02/28/10-principios-basicos-para-desarrollo-seguro/" text:custom1="Español">[1]</text:bibliography-mark></text:span><text:bookmark-end text:name="__RefHeading__1932_1276364847"/></text:h>
      <text:p text:style-name="P11">Los atacantes tienen 4 ventajas sobre los desarrolladores:</text:p>
      <text:list xml:id="list1145670043" text:style-name="L4">
        <text:list-item>
          <text:p text:style-name="P81">Quien defiende debe preocuparse por proteger TODOS los puntos; el atacante va a seleccionar solo uno, <text:span text:style-name="T7">el mas débil.</text:span></text:p>
        </text:list-item>
        <text:list-item>
          <text:p text:style-name="P82"><text:span text:style-name="T16">Quien</text:span> defiende va a preocuparse de las deficiencias conocidas, el atacante va a probar nuevas formas de llevar a cabo sus ataques</text:p>
        </text:list-item>
        <text:list-item>
          <text:p text:style-name="P83">Quien defiende va a preocuparse de las seguridades en todo momento, el atacante va ha hacer su movimiento cuando lo crea conveniente</text:p>
        </text:list-item>
        <text:list-item>
          <text:p text:style-name="P83">Quien defiende debe respetar reglas, el atacante <text:span text:style-name="T7">puede y jugará</text:span> sucio.</text:p>
        </text:list-item>
      </text:list>
      <text:p text:style-name="P13">Tomando en cuenta esta desventaja el desarrollo seguro debe ser un proceso cotidiano y exhaustivo y que en inicio se debe tener en cuenta los siguientes 10 aspectos:</text:p>
      <text:list xml:id="list3884754512" text:style-name="L5">
        <text:list-item>
          <text:p text:style-name="P84">Partir siempre de un <text:span text:style-name="T4">modelo de permisos mínimos, </text:span><text:span text:style-name="T17">es decir se hace un sistema con los permisos </text:span><text:span text:style-name="T19">completamente negados</text:span><text:span text:style-name="T17"> y luego </text:span><text:span text:style-name="T20">escalando </text:span><text:span text:style-name="T17">hasta el punto establecido en los requerimientos.</text:span></text:p>
        </text:list-item>
        <text:list-item>
          <text:p text:style-name="P84"><text:span text:style-name="T17">Cuando un aplicativo que va a pasar a certificación se debe asegurar de que no quede codificación de </text:span><text:span text:style-name="T4">pruebas de funcionalidad por separado</text:span><text:span text:style-name="T17">, </text:span><text:span text:style-name="T4">lineas de debug</text:span><text:span text:style-name="T17">, </text:span><text:span text:style-name="T4">accesos backDoor de pruebas de desarrollo</text:span><text:span text:style-name="T17">. </text:span><text:span text:style-name="T13">Ninguna casa es bella con los andamios a la vista</text:span></text:p>
        </text:list-item>
        <text:list-item>
          <text:p text:style-name="P85"><text:span text:style-name="T17">Nunca confiar en los datos que se ingresan a la aplicación, todo dato debe ser verificado, para garantizar que todo lo ingresado esta dentro de lo esperado para el tipo y valor esperado y ademas evitar inyecciones SQL ver Pág.: </text:span><text:span text:style-name="T17"><text:bookmark-ref text:reference-format="page" text:ref-name="__RefHeading___Toc10684_1789360074">5</text:bookmark-ref></text:span><text:span text:style-name="T17"><text:s/></text:span><text:span text:style-name="T17"><text:bookmark-ref text:reference-format="text" text:ref-name="__RefHeading___Toc10684_1789360074">Inyección SQL A1</text:bookmark-ref></text:span><text:span text:style-name="T17">.</text:span></text:p>
        </text:list-item>
        <text:list-item>
          <text:p text:style-name="P85"><text:span text:style-name="T17">Hacer seguimiento a las </text:span><text:span text:style-name="T18">tecnologías</text:span><text:span text:style-name="T17"> utilizadas en los desarrollos, pues estas van evolucionando y mejorando constantemente, y </text:span><text:span text:style-name="T4">pueden dejar obsoletos nuestros desarrollos.</text:span></text:p>
        </text:list-item>
        <text:list-item>
          <text:p text:style-name="P85"><text:span text:style-name="T17">Todos los accesos a los sistemas deben ser validados. </text:span><text:span text:style-name="T18">Hasta en los ambientes de desarrollo el ingreso a aplicativos debe hacerse con las credenciales del usuario.</text:span></text:p>
        </text:list-item>
        <text:list-item>
          <text:p text:style-name="P85">Para intercambiar información sensible <text:span text:style-name="Strong_20_Emphasis">utilizar protocolos para cifrar las comunicaciones</text:span>, y en el caso de almacenamiento <text:span text:style-name="Strong_20_Emphasis">la información confidencial debería estar cifrada utilizando algoritmos fuertes y claves robustas</text:span>.</text:p>
        </text:list-item>
        <text:list-item>
          <text:p text:style-name="P86">Cualquier funcionalidad, campo, botón o menú <text:span text:style-name="Strong_20_Emphasis">nuevo debe agregarse de acuerdo a los requerimientos de diseño</text:span>. De esta forma se evita tener porciones de código que resultan siendo innecesarias.</text:p>
        </text:list-item>
        <text:list-item>
          <text:p text:style-name="P86"><text:span text:style-name="Strong_20_Emphasis">La información almacenada en dispositivos móviles debería ser la mínima</text:span>, y más si se <text:soft-page-break/>trata de contraseñas o datos de sesión. Este tipo de dispositivos son los más propensos a ser que se pierdan y por lo tanto su información puede ser expuestas más fácilmente.</text:p>
        </text:list-item>
        <text:list-item>
          <text:p text:style-name="P86"><text:span text:style-name="Strong_20_Emphasis">Cualquier cambio que se haga debería quedar documentado</text:span>, esto facilitará modificaciones futuras.</text:p>
        </text:list-item>
        <text:list-item>
          <text:p text:style-name="P86"><text:span text:style-name="Strong_20_Emphasis">Poner más cuidado en los puntos más vulnerables</text:span>, no hay que olvidar que el nivel máximo de seguridad viene dado por el punto más débil.</text:p>
        </text:list-item>
      </text:list>
      <text:p text:style-name="P14">Partiendo de estos principios se pondré el desarrollo de estos a posterior, Ver: <text:bookmark-ref text:reference-format="page" text:ref-name="__RefHeading___Toc3572_1328538540">9</text:bookmark-ref><text:s/><text:bookmark-ref text:reference-format="text" text:ref-name="__RefHeading___Toc3572_1328538540">Ejemplos y aplicación de recomendaciones</text:bookmark-ref></text:p>
      <text:h text:style-name="P121" text:outline-level="1"/>
      <text:h text:style-name="P122" text:outline-level="1"><text:bookmark-start text:name="__RefHeading__2087_552988821"/><text:span text:style-name="T41">Recomendaciones </text:span>OWASP <text:span text:style-name="T41">para el desarrollo web </text:span><text:span text:style-name="T41"><text:bibliography-mark text:identifier="TOP002" text:bibliography-type="www" text:author="OWASP FUNDATION" text:month="06" text:title="OWASP Top 10 - 2013" text:year="2013" text:url="https://www.owasp.org/images/5/5f/OWASP_Top_10_-_2013_Final_-_Espa%C3%B1ol.pdf" text:custom1="English">[2]</text:bibliography-mark></text:span><text:span text:style-name="T41"><text:s/></text:span><text:bookmark-end text:name="__RefHeading__2087_552988821"/></text:h>
      <text:p text:style-name="P18"><text:span text:style-name="T41">Adicional a los principios de desarrollo seguro, existen infinidad de puntos críticos de seguridad y para lo cual se utiliza los d</text:span>iez riesgos mas <text:span text:style-name="T28">críticos</text:span> en aplicaciones <text:span text:style-name="T41">extraídos de </text:span>Web <text:span text:style-name="T35">en el OWASP Top 10 2013, que son documentados a continuación, para su posterior desarrollo; ver: </text:span><text:span text:style-name="T35"><text:bookmark-ref text:reference-format="page" text:ref-name="__RefHeading___Toc3572_1328538540">9</text:bookmark-ref></text:span><text:span text:style-name="T35"><text:s/></text:span><text:span text:style-name="T35"><text:bookmark-ref text:reference-format="text" text:ref-name="__RefHeading___Toc3572_1328538540">Ejemplos y aplicación de recomendaciones</text:bookmark-ref></text:span></text:p>
      <text:h text:style-name="Heading_20_2" text:outline-level="2"><text:bookmark-start text:name="__RefHeading___Toc10684_1789360074"/>Inyección SQL <text:span text:style-name="T58">A1</text:span><text:bookmark-end text:name="__RefHeading___Toc10684_1789360074"/></text:h>
      <text:p text:style-name="P18">Método de infiltración (inyección) de código intruso en lenguaje SQL, para explotar una vulnerabilidad y realizar operaciones sobre la base de datos.</text:p>
      <text:h text:style-name="P116" text:outline-level="2"><text:bookmark-start text:name="__RefHeading___Toc11682_1789360074"/><text:span text:style-name="T26">Perdida </text:span>Autenticación y gestión de sesiones <text:span text:style-name="T58">A2</text:span><text:bookmark-end text:name="__RefHeading___Toc11682_1789360074"/></text:h>
      <text:p text:style-name="P19"><text:span text:style-name="T26">Esta vulnerabilidad </text:span>permiten a un atacante suplantar la información de un determinado usuario, pudiendo llegar a obtener una cuenta de administración que le permita sabotear los controles de autorización y registro de la aplicación. Esta situación podría ocasionar un acceso no autorizado a cualquier tipo de información que se encuentre almacenada en el servidor o los servicios que han sido comprometidos.</text:p>
      <text:h text:style-name="Heading_20_2" text:outline-level="2"><text:bookmark-start text:name="__RefHeading___Toc10773_1789360074"/><text:span text:style-name="T27">Secuencia de Comandos en Sitios Cruzados </text:span>XSS <text:span text:style-name="T58">A3</text:span><text:bookmark-end text:name="__RefHeading___Toc10773_1789360074"/></text:h>
      <text:p text:style-name="P20">Es un vulnerabilidad que permite a una tercera persona inyectar en páginas web visitadas por el usuario código JavaScript o en otro lenguaje similar (ej: VBScript), evitando medidas de control como la Política del mismo origen, <text:span text:style-name="T29">a lo que se debe tomar las siguientes acciones:</text:span></text:p>
      <text:list xml:id="list737510318" text:style-name="L6">
        <text:list-item>
          <text:p text:style-name="P75">Filtrar las salidas (validar que los datos que mostramos en la interfaz estén bien formados y no hayan sido hechos por algún ataque)</text:p>
        </text:list-item>
        <text:list-item>
          <text:p text:style-name="P87">Cumplir <text:span text:style-name="T15">las reglas propuestas por la OWASP para evitar XSS.</text:span><text:span text:style-name="T15"><text:bibliography-mark text:identifier="XSS001" text:bibliography-type="www" text:author="Eoin Keary - eoin.keary@owasp.org  Jeff Williams - jeff.williams@owasp.org  Jim Manico - jim@owasp.org  Neil Mattatall - neil@owasp.org " text:month="12" text:title="XSS (Cross Site Scripting) Prevention Cheat Sheet" text:year="2015" text:url="https://www.owasp.org/index.php/XSS_%28Cross_Site_Scripting%29_Prevention_Cheat_Sheet" text:custom1="English">[3]</text:bibliography-mark></text:span></text:p>
          <text:list>
            <text:list-item>
              <text:p text:style-name="P87">Regla #0 - Nunca insertar datos no confiables excepto en lugares permitidos</text:p>
            </text:list-item>
            <text:list-item>
              <text:p text:style-name="P87">Regla #1 – <text:span text:style-name="T29">Agregar caracteres de escape</text:span> HTML antes de insertar datos no confiables en el contenido de un elemento HTML</text:p>
            </text:list-item>
            <text:list-item>
              <text:p text:style-name="P87">Regla #2 - <text:span text:style-name="T29">Agregar caracteres de escape en </text:span>atributos antes de insertar datos no confiables en atributos HTML comunes</text:p>
            </text:list-item>
            <text:list-item>
              <text:p text:style-name="P87">Regla #3 - <text:span text:style-name="T29">Agregar caracteres de escape en código</text:span> JavaScript antes de insertar datos no confiables en datos JavaScript</text:p>
            </text:list-item>
            <text:list-item>
              <text:p text:style-name="P87">Regla #4 - <text:span text:style-name="T29">Agregar caracteres de escape en paginas</text:span> CSS antes de insertar datos no confiables en propiedades HTML de estilo</text:p>
            </text:list-item>
            <text:list-item>
              <text:p text:style-name="P87">Regla #5 - <text:span text:style-name="T29">Agregar caracteres de escape</text:span> <text:span text:style-name="T29">en </text:span>URL antes de insertar datos no confiables en <text:soft-page-break/>atributos URL</text:p>
            </text:list-item>
            <text:list-item>
              <text:p text:style-name="P87">R<text:span text:style-name="T25">egla</text:span> #6 - Desinfecte Formato HTML con una biblioteca diseñada para el empleo</text:p>
            </text:list-item>
          </text:list>
        </text:list-item>
      </text:list>
      <text:h text:style-name="Heading_20_2" text:outline-level="2"><text:bookmark-start text:name="__RefHeading___Toc10785_1789360074"/>Referencia <text:span text:style-name="T33">Directa</text:span> <text:span text:style-name="T33">I</text:span>nsegura a objetos <text:span text:style-name="T58">A4</text:span><text:bookmark-end text:name="__RefHeading___Toc10785_1789360074"/></text:h>
      <text:p text:style-name="Text_20_body">Las vulnerabilidades relacionadas con la referencia directa a objetos permiten a un atacante la posibilidad de obtener manipular referencias internas de la aplicación para acceder a objetos sin autorización. Es decir, la aplicación desarrollada que es vulnerable a este tipo de ataques permite el acceso a ficheros, directorios o registros de la base de datos a partir, entre otros, de un enlace a una URL o a un parámetro en un formulario.</text:p>
      <text:list xml:id="list493531633" text:style-name="L7">
        <text:list-item>
          <text:p text:style-name="P76">Utilizar referencias indirectas. </text:p>
        </text:list-item>
        <text:list-item>
          <text:p text:style-name="P76">Establecer un estándar a la hora de hacer referencia del servidor</text:p>
        </text:list-item>
        <text:list-item>
          <text:p text:style-name="P76">Evitar exponer a los usuarios referencias directas a objetos (como nombres de fichero o claves primarias)</text:p>
        </text:list-item>
        <text:list-item>
          <text:p text:style-name="P76">Validar cualquier ocurrencia a un objeto utilizado white-list.</text:p>
        </text:list-item>
        <text:list-item>
          <text:p text:style-name="P76">Verificar el nivel de autorización sobre los objetos referenciados.</text:p>
        </text:list-item>
      </text:list>
      <text:h text:style-name="P117" text:outline-level="2"><text:bookmark-start text:name="__RefHeading___Toc11890_1789360074"/>Configuración de Seguridad Incorrecta <text:span text:style-name="T58">A5</text:span><text:bookmark-end text:name="__RefHeading___Toc11890_1789360074"/></text:h>
      <text:p text:style-name="P22">En los distintos elementos que componen una arquitectura de los aplicativos puestos en producción.<text:bibliography-mark text:identifier="TOP002" text:bibliography-type="www" text:author="OWASP FUNDATION" text:month="06" text:title="OWASP Top 10 - 2013" text:year="2013" text:url="https://www.owasp.org/images/5/5f/OWASP_Top_10_-_2013_Final_-_Espa%C3%B1ol.pdf" text:custom1="English">[2]</text:bibliography-mark></text:p>
      <text:list xml:id="list262860827" text:style-name="L8">
        <text:list-item>
          <text:p text:style-name="P88">Un proceso rápido, fácil y repetible de fortalecimiento para obtener un entorno apropiadamente asegurado. Los entornos de Desarrollo, QA y Producción deben ser configurados idénticamente (con diferentes contraseñas usadas en cada entorno). Este proceso puede ser automático para minimizar el esfuerzo de configurar un nuevo entorno seguro.</text:p>
        </text:list-item>
        <text:list-item>
          <text:p text:style-name="P88">Un proceso para mantener y desplegar las nuevas actualizaciones y parches de software de una manera oportuna para cada entorno. Debe incluir también todas las librerías de código.</text:p>
        </text:list-item>
        <text:list-item>
          <text:p text:style-name="P88">Una fuerte arquitectura de aplicación que proporcione una separación segura y efectiva entre los componentes.</text:p>
        </text:list-item>
        <text:list-item>
          <text:p text:style-name="P88">Considere ejecutar escaneos y realizar auditorías periódicamente para ayudar a detectar fallos de configuración o parches omitidos.</text:p>
        </text:list-item>
      </text:list>
      <text:h text:style-name="Heading_20_2" text:outline-level="2"><text:bookmark-start text:name="__RefHeading___Toc11892_1789360074"/><text:span text:style-name="T34">Exposición</text:span> de datos Sensibles <text:span text:style-name="T58">A6</text:span><text:bookmark-end text:name="__RefHeading___Toc11892_1789360074"/></text:h>
      <text:p text:style-name="P23">En el proceso de desarrollo se tiene accesos a base de datos con información sensible que puede ser utilizada de manera indebida por el personal que tiene acceso a la misma, para lo cual se puede usar diversas técnicas de enmascaramiento, estático EDE1 y dinámico EDD2</text:p>
      <text:list xml:id="list3852080865" text:style-name="L9">
        <text:list-item>
          <text:p text:style-name="P89"><text:soft-page-break/>EDE Proporciona una alta calidad de datos de prueba realista para su uso en entornos de no producción</text:p>
        </text:list-item>
        <text:list-item>
          <text:p text:style-name="P89">EDD Esta crea una capa adicional entre las bases de datos y aplicaciones que oculta de manera selectiva la información sensible.</text:p>
        </text:list-item>
        <text:list-item>
          <text:p text:style-name="P90">No tener respaldos innecesarias o sin controlar</text:p>
        </text:list-item>
        <text:list-item>
          <text:p text:style-name="P90">Deshabilitar el auto completado de de formularios que tomen información sensible y el cache da las paginas que contengan datos sensibles.</text:p>
        </text:list-item>
      </text:list>
      <text:h text:style-name="Heading_20_2" text:outline-level="2"><text:bookmark-start text:name="__RefHeading___Toc11894_1789360074"/>Ausencia de control de acceso a las funciones <text:span text:style-name="T58">A7</text:span><text:bookmark-end text:name="__RefHeading___Toc11894_1789360074"/></text:h>
      <text:p text:style-name="P24">Las aplicaciones web pueden no tener un control de acceso a sus diversas funcionalidades por lo que se debe tomar en cuenta, las siguientes recomendaciones:</text:p>
      <text:list xml:id="list3896478637" text:style-name="L10">
        <text:list-item>
          <text:p text:style-name="P91">El proceso para asignar accesos y permisos debe ser actualizable y auditable fácilmente, y debe ser totalmente parametrizable, no tener código quemado en aplicaciones o en base de datos</text:p>
        </text:list-item>
        <text:list-item>
          <text:p text:style-name="P91">El sistema en inicio debe bloquear todo y sobre este ir asignado los niveles de acceso requeridos por los usuarios.</text:p>
        </text:list-item>
        <text:list-item>
          <text:p text:style-name="P91">Si la funcionalidad forma parte del flujo de trabajo, verifique y asegure <text:span text:style-name="T37">estén</text:span> en la configuraciones correcta para permitir su correcto uso</text:p>
        </text:list-item>
      </text:list>
      <text:h text:style-name="P118" text:outline-level="2"><text:bookmark-start text:name="__RefHeading___Toc10787_1789360074"/>CSRF <text:span text:style-name="T38">Falsificación a sitios cruzados A8</text:span><text:bookmark-end text:name="__RefHeading___Toc10787_1789360074"/></text:h>
      <text:p text:style-name="P25">Esta vulnerabilidad se da cuando un atacante “simula” ser un usuario legitimo, suplantando las solicitudes HTTP al servidor, <text:span text:style-name="T39">para evitarlas se puede:</text:span></text:p>
      <text:list xml:id="list2916657124" text:style-name="L11">
        <text:list-item>
          <text:p text:style-name="P77">Expirar las sesiones luego de un tiempo de inactividad parametrizable (timeout), incluido en las políticas de seguridad de la institución.</text:p>
        </text:list-item>
        <text:list-item>
          <text:p text:style-name="P77">Manejar un token asociado a la sesión de usuario, no predecible por peticiones.</text:p>
        </text:list-item>
        <text:list-item>
          <text:p text:style-name="P77">Los enlaces privados solamente deben ser vistos si un usuario ha validado su sesión y jamás deben ser expuestos en e-mails o páginas públicas.</text:p>
        </text:list-item>
      </text:list>
      <text:h text:style-name="P119" text:outline-level="2"><text:bookmark-start text:name="__RefHeading___Toc1576_2119074807"/>Utilización de componentes con vulnerabilidades conocidas <text:span text:style-name="T58">A9</text:span><text:bookmark-end text:name="__RefHeading___Toc1576_2119074807"/></text:h>
      <text:p text:style-name="P26">En el desarrollo se suelen usar un sin numero de librerías, frameworks y otros componentes que pueden tener vulnerabilidades detectadas y que facilitarían a un atacante sus labores, se pueden tomar las siguientes medidas:</text:p>
      <text:list xml:id="list875941419" text:style-name="L12">
        <text:list-item>
          <text:p text:style-name="P93">Identificación de todos los componentes que un desarrollo posee</text:p>
        </text:list-item>
        <text:list-item>
          <text:p text:style-name="P93"><text:soft-page-break/>Revisar la seguridad de cada uno de los componentes del desarrollo</text:p>
        </text:list-item>
        <text:list-item>
          <text:p text:style-name="P93">Establecer políticas de seguridad que regulen el uso de estos componentes.</text:p>
        </text:list-item>
        <text:list-item>
          <text:p text:style-name="P93">Se considerara el uso de otras capas de seguridad alrededor del componente para deshabilitar funcionalidades no utilizadas para blindar aspectos débiles o vulnerables.</text:p>
        </text:list-item>
      </text:list>
      <text:p text:style-name="Bibliography_20_Heading">Redirección y reenvíos no validados <text:span text:style-name="T58">A10</text:span></text:p>
      <text:p text:style-name="P7">Evitar uso de redirecciones y reenvío. Toda redirección tendría que ser validada previamente comprobando que se va a realizar a un destino válido y confiable</text:p>
      <text:list xml:id="list3537101911" text:style-name="L13">
        <text:list-item>
          <text:p text:style-name="P94">Simplemente evitando el uso de re direcciones y re envíos</text:p>
        </text:list-item>
        <text:list-item>
          <text:p text:style-name="P94">Si se hacen estas redirecciones y re envíos, no utilizar parámetros del url que puedan ser manipulables por el usuario</text:p>
        </text:list-item>
        <text:list-item>
          <text:p text:style-name="P94">Si no se puede prescindir del uso de parámetros manipulables, asegurarnos que los parámetros suministrados sean validos y autorizado para el usuario.</text:p>
        </text:list-item>
      </text:list>
      <text:h text:style-name="P119" text:outline-level="2"><text:bookmark-start text:name="__RefHeading___Toc10791_1789360074"/>Miselaneos<text:bookmark-end text:name="__RefHeading___Toc10791_1789360074"/></text:h>
      <text:p text:style-name="P27">Recomendaciones varias para evitar ataques:</text:p>
      <text:list xml:id="list30520377" text:style-name="L14">
        <text:list-item>
          <text:p text:style-name="P78">Evitar la copia de componentes de la página.</text:p>
        </text:list-item>
        <text:list-item>
          <text:p text:style-name="P78">Validar Longitud de los campos</text:p>
        </text:list-item>
        <text:list-item>
          <text:p text:style-name="P78">Evitar que en las URLs se puedan escalar directorios o carpetas del sistema</text:p>
        </text:list-item>
        <text:list-item>
          <text:p text:style-name="P78">Para Carga de Archivos a través de las aplicaciones web, Restringir los tipos de archivos aceptados para la carga comprobar la extensión de los archivos y solo permitir que ciertos archivos se puedan subir, utilice listas blancas y listas negras, también compruebe si hay extensiones dobles como por ejemplo Php.png, archivos Htaccess en ASP.NET, archivos de configuración como web.config, revisar los permisos de la carpeta de carga de modo que los archivos dentro de ella no sean ejecutables.</text:p>
        </text:list-item>
      </text:list>
      <text:p text:style-name="P12"/>
      <text:h text:style-name="P122" text:outline-level="1"><text:bookmark-start text:name="__RefHeading___Toc3572_1328538540"/>Ejemplos <text:span text:style-name="T24">y </text:span>aplicación <text:span text:style-name="T29">de recomendaciones</text:span><text:bookmark-end text:name="__RefHeading___Toc3572_1328538540"/></text:h>
      <text:p text:style-name="P28">La parte declarativa de los principios de desarrollo seguro, y del Top 10-2013 de OWASP, es tan solo la retorica, ahora nos ponemos en acción:</text:p>
      <text:p text:style-name="Quotations">Nota: las recomendaciones <text:span text:style-name="T44">realizadas en esta sección </text:span>son para los <text:span text:style-name="T44">lenguajes</text:span> de JAVA, PL-SQL, <text:span text:style-name="T44">JavaScript y PHP. Y se los identificara con &lt;J&gt;, &lt;PL&gt;, &lt;JS&gt; &lt;P&gt; respectivamente</text:span></text:p>
      <text:h text:style-name="Heading_20_2" text:outline-level="2"><text:bookmark-start text:name="__RefHeading___Toc1578_2119074807"/><text:span text:style-name="T43">Acción</text:span>: Desarrollo Seguro<text:bookmark-end text:name="__RefHeading___Toc1578_2119074807"/></text:h>
      <text:h text:style-name="Heading_20_3" text:outline-level="3"><text:bookmark-start text:name="__RefHeading___Toc1580_2119074807"/>Permisos <text:span text:style-name="T43">mínimos</text:span>: <text:bookmark-end text:name="__RefHeading___Toc1580_2119074807"/></text:h>
      <text:p text:style-name="P29">Cuando se desarrolle un aplicativo para web se debe tener el listado de <text:span text:style-name="T45">perfiles</text:span> de los posibles usuarios del sistema, la lista de funcionalidades de cada <text:span text:style-name="T45">perfil </text:span>posee; y, de un usuario que no esta dentro de los roles, como <text:span text:style-name="T7">usuario de control</text:span>.</text:p>
      <text:p text:style-name="P31">Y empezar el desarrollo con el usuario que tiene menos accesos y así hasta el mas alto y siempre estar probando con el <text:span text:style-name="T7">usuario de control</text:span> que no tiene perfiles asignados, <text:span text:style-name="T46">como pruebas transversales a la funcionalidad del aplicativo.</text:span></text:p>
      <text:h text:style-name="Heading_20_3" text:outline-level="3"><text:bookmark-start text:name="__RefHeading___Toc1582_2119074807"/>Retiro de andamios<text:bookmark-end text:name="__RefHeading___Toc1582_2119074807"/></text:h>
      <text:p text:style-name="P30">En el proceso de desarrollo se deja<text:span text:style-name="T46">n:</text:span> <text:span text:style-name="T45">procesos que pueden ser ejecutados por separado sin un usuario con el perfil requerido para dicha acción, </text:span>mensajes al programador durante las corridas del aplicativ<text:span text:style-name="T45">os, tratamiento de excepciones sin el debido nivel de escalamiento y parametrización “quemada” en el sistema, que debe ser revisada solventada de la siguiente manera:</text:span></text:p>
      <text:list xml:id="list625961185" text:style-name="L15">
        <text:list-item>
          <text:p text:style-name="P96">En los aplicativos Web las clases de pruebas de métodos deben quedar completamente deshabilitadas, retirando por completo las clases MAIN &lt;J&gt;.</text:p>
        </text:list-item>
        <text:list-item>
          <text:p text:style-name="P95"><text:span text:style-name="T44">Se debe eliminar TODOS los mensajes de &lt;J&gt;System.out.print, &lt;PL&gt;dbms_output, &lt;JS&gt;alert (que no sean parte de la lógica ), &lt;P&gt;</text:span>print , <text:span text:style-name="T55">etc</text:span></text:p>
        </text:list-item>
        <text:list-item>
          <text:p text:style-name="P97">Los registros de &lt;J&gt;&lt;JS&gt;&lt;P&gt;Log, como los log4j, log, o logger en el desarrollo solo deben usarse dentro del excepciones desarrolladas.</text:p>
          <text:list>
            <text:list-item>
              <text:p text:style-name="P96">Los mensajes de Log que quedan no deben contener información que atenten a la confidencialidad de los datos procesados, es decir no deben incluir: claves, nombres, identificaciones, nombres de usuario, valores monetarios, tokens y cualquier otra información que delate los elementos de seguridad utilizados.</text:p>
            </text:list-item>
            <text:list-item>
              <text:p text:style-name="P98">Los mensajes de Log deben tener correctamente determinado <text:span text:style-name="T46">la correspondencia, esta debe ser implementada con el principio de que la persona a la que esta enfocado el mensaje tiene la capacidad de entenderlo y realizar alguna acción al respecto por lo que tenemos: </text:span></text:p>
              <text:list>
                <text:list-item>
                  <text:p text:style-name="P96"><text:soft-page-break/>Información: son para el usuario, así que por tal motivo deben ser usado en una mínima proporción, <text:span text:style-name="T46">por ejemplo: </text:span><text:span text:style-name="T10">Clave incorrecta, saldo invalido, no puede hacer esta transacción por adeudar créditos.</text:span></text:p>
                </text:list-item>
                <text:list-item>
                  <text:p text:style-name="P96">Advertencia: son <text:span text:style-name="T52">para</text:span> los usuarios y administradores <text:span text:style-name="T46">del aplicativo, por ejemplo: </text:span><text:span text:style-name="T10">Este momento el sistema de recargas de saldo celular se encuentra fuera de servicio, el equipo al que intenta conectarse esta apagado o no responde.</text:span></text:p>
                </text:list-item>
                <text:list-item>
                  <text:p text:style-name="P98">Error: <text:span text:style-name="T46">son para el administrador del aplicativo y para el administrador de la arquitectura, son de orden critico que al usuario no se les muestra por deberse a una in operatividad del aplicativo ejemplo: </text:span><text:span text:style-name="T10">the account is locked, SQL statement is failed</text:span></text:p>
                </text:list-item>
                <text:list-item>
                  <text:p text:style-name="P96">FATAL Error - <text:span text:style-name="T46">SEVERE</text:span>: <text:span text:style-name="T46">estos errores los proporcionan los servidores de aplicaciones y no los aplicativos. Están enfocados a los administradores de arquitectura. Y esperemos no tenerlos. </text:span></text:p>
                </text:list-item>
              </text:list>
            </text:list-item>
          </text:list>
        </text:list-item>
      </text:list>
      <text:h text:style-name="P127" text:outline-level="3"><text:bookmark-start text:name="__RefHeading___Toc1584_2119074807"/>Inyección SQL <text:bookmark-end text:name="__RefHeading___Toc1584_2119074807"/></text:h>
      <text:p text:style-name="P32"><text:span text:style-name="T47">Ver Pág.:</text:span><text:bookmark-ref text:reference-format="page" text:ref-name="__RefHeading___Toc1426_670898744">11</text:bookmark-ref> <text:bookmark-ref text:reference-format="text" text:ref-name="__RefHeading___Toc1426_670898744">Inyección SQL A1</text:bookmark-ref><text:span text:style-name="T47">en </text:span><text:bookmark-ref text:reference-format="text" text:ref-name="__RefHeading___Toc1428_670898744">Acción: OWASP</text:bookmark-ref></text:p>
      <text:h text:style-name="Heading_20_3" text:outline-level="3"><text:bookmark-start text:name="__RefHeading___Toc1586_2119074807"/>Evitar <text:span text:style-name="T47">obsolescencia</text:span><text:bookmark-end text:name="__RefHeading___Toc1586_2119074807"/></text:h>
      <text:p text:style-name="P33">Las arquitecturas en producción no suelen estar muy susceptibles a actualizaciones periódicas, bajo la premisa de: “Si funciona no lo toque”, lo que dificulta la tarea de tener actualizada la arquitectura o que esta tenga actualizaciones menos frecuentes.</text:p>
      <text:p text:style-name="P33">Por tal motivo al momento de desarrollar debemos tener la ultima novedad dentro de nuestro ambiente productivo para poder centrar nuestro producto en estos requerimientos técnicos, recomendar actualizaciones o por lo menos documentar las diversas incompatibilidades. <text:span text:style-name="T48">Por lo que las siguientes recomendaciones son indispensables:</text:span></text:p>
      <text:list xml:id="list1433395391" text:style-name="L16">
        <text:list-item>
          <text:p text:style-name="P99">Conocer la matriz de certificación de todos los elementos de producción</text:p>
        </text:list-item>
        <text:list-item>
          <text:p text:style-name="P99">Ultimo editor certificado para el ambiente de producción</text:p>
        </text:list-item>
        <text:list-item>
          <text:p text:style-name="P99">Librerías compatibles con la versión de servidores de aplicaciones a ser utilizadas</text:p>
        </text:list-item>
        <text:list-item>
          <text:p text:style-name="P99">Uso de Maven de ser necesario &lt;J&gt;</text:p>
        </text:list-item>
      </text:list>
      <text:h text:style-name="Heading_20_3" text:outline-level="3"><text:bookmark-start text:name="__RefHeading___Toc1588_2119074807"/>No usar puertas traseras<text:bookmark-end text:name="__RefHeading___Toc1588_2119074807"/></text:h>
      <text:p text:style-name="P34">En el desarrollo estamos tentados a agilitar nuestra trabajo utilizando y creando accesos no autorizados o BackDoors que no s<text:span text:style-name="T53">implifican</text:span> el tedioso flujo de autentificarnos como usuarios con un perfil determinado, lo que debemos desterrar como practica ya sea la creación de los mismos, <text:span text:style-name="T53">recuerde</text:span> <text:span text:style-name="T11">todo lo que esta desarrollado puede ser ejecutado</text:span></text:p>
      <text:h text:style-name="P128" text:outline-level="3"><text:bookmark-start text:name="__RefHeading___Toc1590_2119074807"/><text:soft-page-break/>Exposición de datos Sensibles<text:bookmark-end text:name="__RefHeading___Toc1590_2119074807"/></text:h>
      <text:p text:style-name="P35"><text:span text:style-name="T47">Ver Pág.: </text:span><text:span text:style-name="T47"><text:bookmark-ref text:reference-format="page" text:ref-name="__RefHeading___Toc1585_670898744">Error: no se encontró el origen de la referencia</text:bookmark-ref></text:span><text:span text:style-name="T47"><text:s/></text:span><text:span text:style-name="T47"><text:bookmark-ref text:reference-format="text" text:ref-name="__RefHeading___Toc1585_670898744">Error: no se encontró el origen de la referencia</text:bookmark-ref></text:span><text:span text:style-name="T47"><text:s/>en </text:span><text:bookmark-ref text:reference-format="text" text:ref-name="__RefHeading___Toc1428_670898744">Acción: OWASP</text:bookmark-ref></text:p>
      <text:h text:style-name="Heading_20_3" text:outline-level="3"><text:bookmark-start text:name="__RefHeading___Toc1592_2119074807"/>Mide tres vez y corta una vez<text:bookmark-end text:name="__RefHeading___Toc1592_2119074807"/></text:h>
      <text:p text:style-name="P36">Una de las cosas que mas se debe cuidar es la de no agregar funcionalidades no solicitadas, por lo que la especificación de requisito de software debe ser lo mas completa y prolija posible, para que no existan: controles de cambios, nuevas funcionalidades, o funcionalidades innecesarias. Así que <text:span text:style-name="T7">mida tres veces y corte una sola</text:span>.</text:p>
      <text:h text:style-name="Heading_20_3" text:outline-level="3"><text:bookmark-start text:name="__RefHeading___Toc1594_2119074807"/>Conocer tus vulnerabilidades<text:bookmark-end text:name="__RefHeading___Toc1594_2119074807"/></text:h>
      <text:p text:style-name="P36">Una vez que se tiene la especificación del requisito de software se puede conocer las posibles puntos donde se puede incurrir en vulnerabilidades, estas deben ser tomadas en cuenta y solventar todos y cada uno de estos puntos.</text:p>
      <text:p text:style-name="P36">Para esto se debe hacer un ciclo de mejora continua que debe ser:</text:p>
      <text:list xml:id="list3551009882" text:style-name="L17">
        <text:list-item>
          <text:p text:style-name="P100">Identificación de vulnerabilidades al desarrollo.</text:p>
        </text:list-item>
        <text:list-item>
          <text:p text:style-name="P100">Priorizar <text:span text:style-name="T49">de acuerdo al nivel de criticidad y de exposición al usuario.</text:span></text:p>
        </text:list-item>
        <text:list-item>
          <text:p text:style-name="P101">Desarrollo de la solución tomando en cuenta los puntos vulnerables.</text:p>
        </text:list-item>
        <text:list-item>
          <text:p text:style-name="P101">Testeo de vulnerabilidades <text:span text:style-name="T53">por los desarrolladores</text:span> y <text:span text:style-name="T50">hacker de sombreo blanco</text:span>.</text:p>
        </text:list-item>
        <text:list-item>
          <text:p text:style-name="P101">Y se vuelve al primer punto.</text:p>
        </text:list-item>
      </text:list>
      <text:h text:style-name="Heading_20_2" text:outline-level="2"><text:bookmark-start text:name="__RefHeading___Toc1428_670898744"/>Acción: OWASP<text:bookmark-end text:name="__RefHeading___Toc1428_670898744"/></text:h>
      <text:h text:style-name="P127" text:outline-level="3"><text:bookmark-start text:name="__RefHeading___Toc1426_670898744"/>Inyección SQL <text:span text:style-name="T59">A1</text:span><text:bookmark-end text:name="__RefHeading___Toc1426_670898744"/></text:h>
      <text:p text:style-name="P37">La prevención de este tema se realiza de las siguientes maneras:</text:p>
      <text:list xml:id="list2551160026" text:style-name="L18">
        <text:list-item>
          <text:p text:style-name="P102">&lt;J&gt;Se utiliza el ESAPI_user como librería para prevención de inyecciones sql.</text:p>
        </text:list-item>
        <text:list-item>
          <text:p text:style-name="P102">&lt;J&gt;Al tenerse consultas JDBC de statements con parámetros, estos deben pasar por procesos de listas blancas o listas negras de caracteres que no se puedan utilizar de acuerdo a la base de datos expuesta</text:p>
        </text:list-item>
        <text:list-item>
          <text:p text:style-name="P103">&lt;J&gt; &lt;PL&gt;Las notificaciones al usuario no deben mostrar mensajes estándares de la base de datos como ORA-01129, que indica que se esta utilizando una determinada base de datos, pues informa a un posible atacante que técnicas usar con determinado servicio.</text:p>
        </text:list-item>
        <text:list-item>
          <text:p text:style-name="P102">&lt;PL&gt;En los desarrollos no se permite la creación de consultas dinámicas</text:p>
        </text:list-item>
        <text:list-item>
          <text:p text:style-name="P103">En el supuesto caso de tener un posible intento de inyección notificar a el personal de administración del aplicativo y/o administración de la arquitectura para poder tomar <text:soft-page-break/>acciones sobre el evento.</text:p>
        </text:list-item>
      </text:list>
      <text:h text:style-name="Heading_20_3" text:outline-level="3"><text:bookmark-start text:name="__RefHeading___Toc1596_2119074807"/><text:span text:style-name="T26">Perdida </text:span>Autenticación y gestión de sesiones <text:span text:style-name="T59">A2</text:span><text:bookmark-end text:name="__RefHeading___Toc1596_2119074807"/></text:h>
      <text:p text:style-name="P38">Para controlar esta falencia se recomienda seguir los siguientes acciones.</text:p>
      <text:list xml:id="list2590210269" text:style-name="L19">
        <text:list-item>
          <text:p text:style-name="P92">Un <text:span text:style-name="T53">único</text:span> conjunto de controles de autenticación y gestión de sesiones fuerte.</text:p>
        </text:list-item>
        <text:list-item>
          <text:p text:style-name="P104">Añadir la comunicación cifrada en en el proceso de acceso a la aplicación. </text:p>
        </text:list-item>
        <text:list-item>
          <text:p text:style-name="P115">Eliminar, en la medida de lo posible, la utilización de mecanismos de autenticación del tipo “Recordar Contraseña” puesto que, generalmente, esta contraseña se almacena para poder ser utilizada y la sustracción de ésta valor podría ocasionar la suplantación de usuarios. Por supuesto, en este punto entramos en el equilibrio entre seguridad y funcionalidad. </text:p>
        </text:list-item>
        <text:list-item>
          <text:p text:style-name="P115">Ofrecer un enlace en todas las páginas de la aplicación para que el usuario pueda cerrar la sesión. </text:p>
        </text:list-item>
        <text:list-item>
          <text:p text:style-name="P115">Gestionar de forma adecuada la caducidad de las sesiones ante un período de inactividad. </text:p>
        </text:list-item>
        <text:list-item>
          <text:p text:style-name="P104">Gestionar de forma adecuada el tratamiento de la información cuando se introduzca un identificador de sesión caducado o no válido. </text:p>
        </text:list-item>
      </text:list>
      <text:h text:style-name="Heading_20_3" text:outline-level="3"><text:bookmark-start text:name="__RefHeading___Toc11684_1789360074"/><text:span text:style-name="T31">Aplicación</text:span> de reglas XSS <text:bibliography-mark text:identifier="XSS001" text:bibliography-type="www" text:author="Eoin Keary - eoin.keary@owasp.org  Jeff Williams - jeff.williams@owasp.org  Jim Manico - jim@owasp.org  Neil Mattatall - neil@owasp.org " text:month="12" text:title="XSS (Cross Site Scripting) Prevention Cheat Sheet" text:year="2015" text:url="https://www.owasp.org/index.php/XSS_%28Cross_Site_Scripting%29_Prevention_Cheat_Sheet" text:custom1="English">[3]</text:bibliography-mark><text:s/><text:span text:style-name="T59">A3</text:span><text:bookmark-end text:name="__RefHeading___Toc11684_1789360074"/></text:h>
      <text:h text:style-name="P130" text:outline-level="4"><text:bookmark-start text:name="__RefHeading___Toc1598_2119074807"/>Regla #0 - Nunca insertar datos no confiables excepto en lugares permitidos<text:bookmark-end text:name="__RefHeading___Toc1598_2119074807"/></text:h>
      <text:p text:style-name="Text_20_body">&lt;J&gt;&lt;P&gt;&lt;JS&gt; La regla cero nos dice, negar todo!, es decir, no colocar ningún dato ingresado por el usuario en el HTML a menos que esté incluido en alguna de las reglas #1 a #5. Esta regla sirve como complemento a todas las demás, es decir, si no está incluido en las otras reglas, entonces no lo incluyas en tu HTML!, ejemplos:</text:p>
      <table:table table:name="Tabla5" table:style-name="Tabla5">
        <table:table-column table:style-name="Tabla5.A"/>
        <table:table-column table:style-name="Tabla5.B"/>
        <table:table-column table:style-name="Tabla5.C"/>
        <table:table-row>
          <table:table-cell table:style-name="Tabla5.A1" table:number-rows-spanned="5" office:value-type="string">
            <text:p text:style-name="P50">Nunca Poner </text:p>
          </table:table-cell>
          <table:table-cell table:style-name="Tabla5.B1" office:value-type="string">
            <text:p text:style-name="P49">Explicación</text:p>
          </table:table-cell>
          <table:table-cell table:style-name="Tabla5.C1" office:value-type="string">
            <text:p text:style-name="P49">Ejemplo</text:p>
          </table:table-cell>
        </table:table-row>
        <table:table-row>
          <table:covered-table-cell/>
          <table:table-cell table:style-name="Tabla5.B2" office:value-type="string">
            <text:p text:style-name="P8"><text:span text:style-name="T21">D</text:span>irectamente en un script</text:p>
          </table:table-cell>
          <table:table-cell table:style-name="Tabla5.C2" office:value-type="string">
            <text:p text:style-name="P15">&lt;script&gt;…<text:span text:style-name="T21">dato no confiable</text:span>....&lt;/script&gt;</text:p>
          </table:table-cell>
        </table:table-row>
        <table:table-row>
          <table:covered-table-cell/>
          <table:table-cell table:style-name="Tabla5.B3" office:value-type="string">
            <text:p text:style-name="P49">Dentro de un comentario HTML</text:p>
          </table:table-cell>
          <table:table-cell table:style-name="Tabla5.C3" office:value-type="string">
            <text:p text:style-name="P49">&lt;!-- <text:span text:style-name="T8">…</text:span><text:span text:style-name="T7">dato no confiable</text:span><text:span text:style-name="T8">....</text:span> --&gt;</text:p>
          </table:table-cell>
        </table:table-row>
        <table:table-row>
          <table:covered-table-cell/>
          <table:table-cell table:style-name="Tabla5.B4" office:value-type="string">
            <text:p text:style-name="P8"><text:span text:style-name="T21">E</text:span>n el nombre de un atributo</text:p>
          </table:table-cell>
          <table:table-cell table:style-name="Tabla5.C4" office:value-type="string">
            <text:p text:style-name="P8">&lt;div <text:span text:style-name="T7">…</text:span><text:span text:style-name="T9">dato no confiable</text:span><text:span text:style-name="T7">....</text:span>=test /&gt; </text:p>
          </table:table-cell>
        </table:table-row>
        <table:table-row>
          <table:covered-table-cell/>
          <table:table-cell table:style-name="Tabla5.B5" office:value-type="string">
            <text:p text:style-name="P8"><text:span text:style-name="T21">E</text:span>n el tag de un nombre</text:p>
          </table:table-cell>
          <table:table-cell table:style-name="Tabla5.C5" office:value-type="string">
            <text:p text:style-name="P8">&lt;<text:span text:style-name="T7">…</text:span><text:span text:style-name="T9">dato no confiable</text:span><text:span text:style-name="T7">....</text:span> href="/test" /&gt; </text:p>
          </table:table-cell>
        </table:table-row>
      </table:table>
      <text:p text:style-name="P8"/>
      <text:h text:style-name="P131" text:outline-level="4"><text:bookmark-start text:name="__RefHeading___Toc10781_17893600741"/>Regla #1 - <text:span text:style-name="T29">Agregar caracteres de escape</text:span> HTML antes de insertar datos no confiables en el contenido de un elemento HTML<text:bookmark-end text:name="__RefHeading___Toc10781_17893600741"/></text:h>
      <text:p text:style-name="P10"><text:span text:style-name="T55">&lt;J&gt;&lt;P&gt;&lt;JS&gt; </text:span>Esta regla sirve para cuando queremos poner datos no confiables directamente en algún lugar del cuerpo HTML. Esto incluye dentro de todos los tags conocidos como div, p, b, td, etc. </text:p>
      <table:table table:name="Tabla3" table:style-name="Tabla3">
        <table:table-column table:style-name="Tabla3.A"/>
        <text:soft-page-break/>
        <table:table-row>
          <table:table-cell table:style-name="Tabla3.A1" office:value-type="string">
            <text:p text:style-name="P53">Ejemplo</text:p>
          </table:table-cell>
        </table:table-row>
        <table:table-row>
          <table:table-cell table:style-name="Tabla3.A2" office:value-type="string">
            <text:p text:style-name="P16">&lt;body&gt;...<text:span text:style-name="T54">Codificar caracteres de escape para datos no confiables aquí.</text:span>..&lt;/body&gt;</text:p>
          </table:table-cell>
        </table:table-row>
        <table:table-row>
          <table:table-cell table:style-name="Tabla3.A2" office:value-type="string">
            <text:p text:style-name="P16">&lt;div&gt;...<text:span text:style-name="T54">Codificar caracteres de escape para datos no confiables aquí.</text:span>..&lt;/div&gt;</text:p>
          </table:table-cell>
        </table:table-row>
      </table:table>
      <text:p text:style-name="P8"><text:span text:style-name="T54">Y </text:span>aplicar para cualquier otro elemento HTML.</text:p>
      <text:p text:style-name="P8">Para <text:span text:style-name="T55">agregar caracteres de escape</text:span> <text:span text:style-name="T55">sobre </text:span>los datos no confiables, lo primero es evitar los delimitadores de tag "&lt;" y "&gt;", además de comillas simples y comillas dobles, que permiten ciertos trucos. Hay dos opciones para hacer esto, eliminamos estos caracteres o los codificamos de forma que el browser los interprete como texto.</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1">Carácter</text:p>
          </table:table-cell>
          <table:table-cell table:style-name="Tabla6.B1" office:value-type="string">
            <text:p text:style-name="P21">Codificación HTML</text:p>
          </table:table-cell>
          <table:table-cell table:style-name="Tabla6.B1" office:value-type="string">
            <text:p text:style-name="P21">Codificación Hexa</text:p>
          </table:table-cell>
          <table:table-cell table:style-name="Tabla6.D1" office:value-type="string">
            <text:p text:style-name="P21">Codificación Decimal</text:p>
          </table:table-cell>
        </table:table-row>
        <table:table-row table:style-name="Tabla6.1">
          <table:table-cell table:style-name="Tabla6.A1" office:value-type="string">
            <text:p text:style-name="P17">&amp;</text:p>
          </table:table-cell>
          <table:table-cell table:style-name="Tabla6.B1" office:value-type="string">
            <text:p text:style-name="P17">&amp;amp;</text:p>
          </table:table-cell>
          <table:table-cell table:style-name="Tabla6.B1" office:value-type="string">
            <text:p text:style-name="P17">&amp;#x26;</text:p>
          </table:table-cell>
          <table:table-cell table:style-name="Tabla6.D1" office:value-type="string">
            <text:p text:style-name="P17">&amp;#38;</text:p>
          </table:table-cell>
        </table:table-row>
        <table:table-row table:style-name="Tabla6.1">
          <table:table-cell table:style-name="Tabla6.A1" office:value-type="string">
            <text:p text:style-name="P17">"</text:p>
          </table:table-cell>
          <table:table-cell table:style-name="Tabla6.B1" office:value-type="string">
            <text:p text:style-name="P17">&amp;quot;</text:p>
          </table:table-cell>
          <table:table-cell table:style-name="Tabla6.B1" office:value-type="string">
            <text:p text:style-name="P17">&amp;#x22;</text:p>
          </table:table-cell>
          <table:table-cell table:style-name="Tabla6.D1" office:value-type="string">
            <text:p text:style-name="P17">&amp;#34;</text:p>
          </table:table-cell>
        </table:table-row>
        <table:table-row table:style-name="Tabla6.1">
          <table:table-cell table:style-name="Tabla6.A1" office:value-type="string">
            <text:p text:style-name="P17">'</text:p>
          </table:table-cell>
          <table:table-cell table:style-name="Tabla6.B1" office:value-type="string">
            <text:p text:style-name="P17">&amp;apos;</text:p>
          </table:table-cell>
          <table:table-cell table:style-name="Tabla6.B1" office:value-type="string">
            <text:p text:style-name="P17">&amp;#x27;</text:p>
          </table:table-cell>
          <table:table-cell table:style-name="Tabla6.D1" office:value-type="string">
            <text:p text:style-name="P17">&amp;#39;</text:p>
          </table:table-cell>
        </table:table-row>
        <table:table-row table:style-name="Tabla6.1">
          <table:table-cell table:style-name="Tabla6.A1" office:value-type="string">
            <text:p text:style-name="P17">&lt;</text:p>
          </table:table-cell>
          <table:table-cell table:style-name="Tabla6.B1" office:value-type="string">
            <text:p text:style-name="P17">&amp;lt;</text:p>
          </table:table-cell>
          <table:table-cell table:style-name="Tabla6.B1" office:value-type="string">
            <text:p text:style-name="P17">&amp;#x3c;</text:p>
          </table:table-cell>
          <table:table-cell table:style-name="Tabla6.D1" office:value-type="string">
            <text:p text:style-name="P17">&amp;#60;</text:p>
          </table:table-cell>
        </table:table-row>
        <table:table-row table:style-name="Tabla6.1">
          <table:table-cell table:style-name="Tabla6.A1" office:value-type="string">
            <text:p text:style-name="P17">&gt;</text:p>
          </table:table-cell>
          <table:table-cell table:style-name="Tabla6.B1" office:value-type="string">
            <text:p text:style-name="P17">&amp;gt;</text:p>
          </table:table-cell>
          <table:table-cell table:style-name="Tabla6.B1" office:value-type="string">
            <text:p text:style-name="P17">&amp;#x3e;</text:p>
          </table:table-cell>
          <table:table-cell table:style-name="Tabla6.D1" office:value-type="string">
            <text:p text:style-name="P17">&amp;#62;</text:p>
          </table:table-cell>
        </table:table-row>
        <table:table-row table:style-name="Tabla6.1">
          <table:table-cell table:style-name="Tabla6.A1" office:value-type="string">
            <text:p text:style-name="P17">/</text:p>
          </table:table-cell>
          <table:table-cell table:style-name="Tabla6.B1" office:value-type="string">
            <text:p text:style-name="P17"/>
          </table:table-cell>
          <table:table-cell table:style-name="Tabla6.B1" office:value-type="string">
            <text:p text:style-name="P17">&amp;#x2F;</text:p>
          </table:table-cell>
          <table:table-cell table:style-name="Tabla6.D1" office:value-type="string">
            <text:p text:style-name="P17">&amp;#47;</text:p>
          </table:table-cell>
        </table:table-row>
      </table:table>
      <text:p text:style-name="P21"/>
      <text:p text:style-name="P21">Esto quiere decir que si el usuario ingresa un ”&gt;”, nosotros deberíamos colocar un &amp;gt; (o &amp;#x26; o &amp;#38;) en su lugar, para que no se interprete como código HTML. </text:p>
      <text:p text:style-name="P21">Algunas codificaciones en hexa<text:span text:style-name="T22">decimales </text:span>o decimal<text:span text:style-name="T22">es</text:span> pueden verse distintas dependiendo de los <text:span text:style-name="T22">navegadores</text:span> según la codificación de caracteres utilizada (UTF-8, ISO 8859-1, etc), así que se recomendaría utilizar la codificación HTML.</text:p>
      <text:p text:style-name="P8">Por ejemplo, el resultado de una inyección es:</text:p>
      <text:p text:style-name="P8">Usuario: <text:span text:style-name="T7">&lt;B&gt;&lt;SCRIPT&gt;alert('XSS');&lt;/SCRIPT&gt;&lt;/B&gt;</text:span></text:p>
      <text:p text:style-name="P8">escapando los tags obtendremos:</text:p>
      <text:p text:style-name="P8">Usuario: <text:span text:style-name="T7">&lt;B&gt;&amp;lt;SCRIPT&amp;gt;alert(&amp;apos;XSS&amp;apos;);&amp;lt;/SCRIPT&amp;gt;&lt;/B&gt;</text:span></text:p>
      <text:p text:style-name="P8">Como se ve, el código actual no ejecutaría ningún alert, sino que mostraría el código en la pantalla (como debería ser).</text:p>
      <text:p text:style-name="P21">En muchos lenguajes existen funciones implementadas para realizar el trabajo de cambiar un carácter por su equivalente HTML, o bien para eliminar estos caracteres.</text:p>
      <text:p text:style-name="P58">NOTA: Lo más importante es nunca aceptar código real JavaScript de una fuente no confiable y luego ejecutarlo. Por ejemplo, un parámetro llamado "CALLBACK" que contiene un fragmento de código JavaScript. Ninguna de las técnicas detalladas podría salvar esta excepción, por lo cual es importante validar los ingresos y chequear los <text:soft-page-break/>parámetros que ingresan los usuarios contra listas blancas que se deberían tener dentro de las aplicaciones.</text:p>
      <text:h text:style-name="P131" text:outline-level="4"><text:bookmark-start text:name="__RefHeading___Toc10923_17893600741"/>Regla #2 - <text:span text:style-name="T29">Agregar caracteres de escape</text:span> atributos antes de insertar datos no confiables en atributos HTML comunes<text:bookmark-end text:name="__RefHeading___Toc10923_17893600741"/></text:h>
      <text:p text:style-name="P8">Esta regla se utiliza para colocar datos no confiables dentro de atributos como width, name, value, etc. Esto no debería usarse para atributos complejos como href, src, style, o cualquiera de los even handlers como onMouseOver. Es extremadamente importante que para los even handlers se siga la regla #3.</text:p>
      <text:list xml:id="list2446526982" text:style-name="L20">
        <text:list-item>
          <text:p text:style-name="P105">&lt;div attr=...<text:span text:style-name="T54">Codificar caracteres de escape </text:span>datos no confiables antes de colocarlos aquí...&gt;contenido&lt;/div&gt; dentro de atributos sin comillas</text:p>
        </text:list-item>
        <text:list-item>
          <text:p text:style-name="P105">&lt;div attr='...<text:span text:style-name="T54">Codificar caracteres de escape </text:span>datos no confiables antes de colocarlos aquí...'&gt;contenido&lt;/div&gt; dentro de atributos con comillas</text:p>
        </text:list-item>
        <text:list-item>
          <text:p text:style-name="P105">&lt;div attr="... <text:span text:style-name="T54">Codificar caracteres de escape</text:span> datos no confiables antes de colocarlos aquí..."&gt;contenido&lt;/div&gt; dentro de atributos con comillas dobles</text:p>
        </text:list-item>
      </text:list>
      <text:p text:style-name="P8">Excepto los caracteres alfanuméricos, escapar todo carácter con valores ASCII menores a 256, con el formato #xHH (es decir, valor hexa) para evitar el problema de salirse de los atributos.</text:p>
      <text:h text:style-name="P131" text:outline-level="4"><text:bookmark-start text:name="__RefHeading___Toc10925_17893600741"/>Regla #3 - <text:span text:style-name="T29">Agregar caracteres de escape</text:span> JavaScript antes de insertar datos no confiables en datos JavaScript<text:bookmark-end text:name="__RefHeading___Toc10925_17893600741"/></text:h>
      <text:p text:style-name="P8">Como tercer regla tenemos la concerniente a los event handlers de JavaScript que pueden ser especificados en varios elementos HTML. El único lugar seguro para poner datos no confiables es dentro de comillas.</text:p>
      <text:list xml:id="list147397212" text:style-name="L21">
        <text:list-item>
          <text:p text:style-name="P79">&lt;script&gt;alert('.. <text:span text:style-name="T12">Codificar caracteres de escape</text:span> datos no confiables antes de colocarlos aquí...')&lt;/script&gt; dentro de un string entre comillas</text:p>
        </text:list-item>
        <text:list-item>
          <text:p text:style-name="P79">&lt;script&gt;x='... <text:span text:style-name="T12">Codificar caracteres de escape</text:span> datos no confiables antes de colocarlos aquí...'&lt;/script&gt; a un lado de una expresión entre comillas</text:p>
        </text:list-item>
        <text:list-item>
          <text:p text:style-name="P79">&lt;div onmouseover='... <text:span text:style-name="T12">Codificar caracteres de escape</text:span> datos no confiables antes de colocarlos aquí...'&lt;/div&gt; dentro de un event handler entre comillas</text:p>
        </text:list-item>
      </text:list>
      <text:p text:style-name="P8">Excepto los caracteres alfanuméricos, escapar todo carácter con valores ASCII menores a 256, con el formato #xHH (es decir, valor hexa) para evitar el problema de cambiar del contexto de datos al contexto script o en otro atributo. No utilizar <text:span text:style-name="T56">codificación de caracteres de escape</text:span> como la barra invertida porque los caracteres como las comillas serán reemplazados por su codificación HTML correspondiente.</text:p>
      <text:h text:style-name="P137" text:outline-level="5"><text:bookmark-start text:name="__RefHeading___Toc10927_17893600741"/><text:soft-page-break/>Regla # 3.1 - Valores JSON de escape en un contexto HTML y leer los datos con JSON.parse <text:bookmark-end text:name="__RefHeading___Toc10927_17893600741"/></text:h>
      <text:p text:style-name="P8">En un mundo Web 2.0, la necesidad de contar con datos generados dinámicamente por una aplicación en un contexto javascript es común. Una estrategia consiste en hacer una llamada AJAX para obtener los valores, pero esto no siempre es lo más adecuado (en cuanto a manejo de recursos). A menudo, en un bloque inicial de JSON dentro de una página es utilizado como único lugar para almacenar varios valores. Estos datos son difíciles, pero no imposible, escapar correctamente sin romper el formato y contenido de los valores.</text:p>
      <text:p text:style-name="P8"/>
      <text:p text:style-name="P62">Bad HTTP response: </text:p>
      <text:p text:style-name="P62">HTTP/1.1 200</text:p>
      <text:p text:style-name="P62">Date: Wed, 06 Feb 2013 10:28:54 GMT</text:p>
      <text:p text:style-name="P62">Server: Microsoft-IIS/7.5....</text:p>
      <text:p text:style-name="P62">Content-Type: text/html; charset=utf-8 &lt;-- bad</text:p>
      <text:p text:style-name="P8"><text:s text:c="2"/></text:p>
      <text:p text:style-name="P63">Content-Length: 373</text:p>
      <text:p text:style-name="P63">Keep-Alive: timeout=5, max=100</text:p>
      <text:p text:style-name="P63">Connection: Keep-Alive</text:p>
      <text:p text:style-name="P63">{"Message":"No HTTP resource was found that matches the request URI 'dev.net.ie/api/pay/.html?HouseNumber=9&amp;AddressLine</text:p>
      <text:p text:style-name="P63"/>
      <text:p text:style-name="P63">=The+Gardens&lt;script&gt;alert(1)&lt;/script&gt;&amp;AddressLine2=foxlodge+woods&amp;TownName=Meath'.","MessageDetail":"No type was found</text:p>
      <text:p text:style-name="P63">that matches the controller named 'pay'."} <text:s/>&lt;-- this script will pop!!</text:p>
      <text:p text:style-name="P8"><text:s text:c="2"/></text:p>
      <text:p text:style-name="P63">Good HTTP response </text:p>
      <text:p text:style-name="P63">HTTP/1.1 200</text:p>
      <text:p text:style-name="P63">Date: Wed, 06 Feb 2013 10:28:54 GMT</text:p>
      <text:p text:style-name="P63">Server: Microsoft-IIS/7.5....</text:p>
      <text:p text:style-name="P63">Content-Type: application/json; charset=utf-8 &lt;--good</text:p>
      <text:p text:style-name="P8">Un anti-patrón común podría ser: </text:p>
      <text:p text:style-name="P63"><text:soft-page-break/>&lt;script&gt;</text:p>
      <text:p text:style-name="P64">var initData = &lt;%= data.to_json %&gt;; </text:p>
      <text:p text:style-name="P64">// NO hacer esto sin codificar los datos con una de las técnicas </text:p>
      <text:p text:style-name="P64">// que se enumeran a continuación.</text:p>
      <text:p text:style-name="P63">&lt;/script&gt;</text:p>
      <text:h text:style-name="Heading_20_5" text:outline-level="5"><text:bookmark-start text:name="__RefHeading___Toc1600_2119074807"/>La codificación de entidades HTML <text:bookmark-end text:name="__RefHeading___Toc1600_2119074807"/></text:h>
      <text:p text:style-name="P8">Esta técnica tiene la ventaja de que la entidad HTML escape con un amplio apoyo y ayuda a separar datos de código del lado del servidor sin tener que cruzar ninguna frontera de contexto. Considere la posibilidad de colocar el bloque de JSON en la página como un elemento normal y luego analizar el innerHTML para obtener el contenido. El javascript que lee el lapso puede vivir en un archivo externo, con lo que la ejecución de la aplicación CSP más fácil. </text:p>
      <text:p text:style-name="P63">&lt;script id="init_data" type="application/json"&gt;</text:p>
      <text:p text:style-name="P63"><text:s text:c="2"/>&lt;%= html_escape(data.to_json) %&gt;</text:p>
      <text:p text:style-name="P63"><text:s/>&lt;/script&gt;</text:p>
      <text:p text:style-name="P63"><text:s/>// external js file</text:p>
      <text:p text:style-name="P63"><text:s/>var dataElement = document.getElementById('init_data');</text:p>
      <text:p text:style-name="P63"><text:s/>// unescape the content of the span</text:p>
      <text:p text:style-name="P63"><text:s/>var jsonText = dataElement.textContent || dataElement.innerText </text:p>
      <text:p text:style-name="P63"><text:s/>var initData = JSON.parse(html_unescape(jsonText));</text:p>
      <text:p text:style-name="P63"/>
      <text:p text:style-name="P8">Una alternativa para <text:span text:style-name="T56">codificar caracteres de escape</text:span> y la representación no literal JSON directamente en JavaScript, es normalizar el lado del servidor JSON mediante la conversión de '&lt;' a '\ u003c' antes de entregarlo al navegador.</text:p>
      <text:h text:style-name="Heading_20_4" text:outline-level="4"><text:bookmark-start text:name="__RefHeading___Toc10929_17893600741"/>Regla #4 - <text:span text:style-name="T29">Agregar caracteres de escape</text:span> CSS antes de insertar datos no confiables en propiedades HTML de estilo<text:bookmark-end text:name="__RefHeading___Toc10929_17893600741"/></text:h>
      <text:p text:style-name="P8">Esta regla existe para los casos en que se desee colocar datos no confiables en una hoja de estilo o en un tag de estilo. Debido al poder de CSS para realizar ataques, es importante que solo se coloquen datos no confiables dentro del valor de una propiedad y no en otros lugares de los datos de estilo. Sobre todo debe tenerse mucho cuidado de no colocar datos no confiables en propiedades como url, behaviour, y custom. Lo mismo se aplica a las expresiones de propiedad de IE, las cuales permiten JavaScript.</text:p>
      <text:list xml:id="list2146451346" text:style-name="L22">
        <text:list-item>
          <text:p text:style-name="P106">&lt;style&gt;selector { property : ...<text:span text:style-name="T56">Codificar caracteres de escape</text:span> datos no confiables antes de <text:soft-page-break/>colocarlos aqui...; } &lt;/style&gt; valor de propiedad</text:p>
        </text:list-item>
        <text:list-item>
          <text:p text:style-name="P107">&lt;span style=property : ...<text:span text:style-name="T56">Codificar caracteres de escape</text:span> <text:span text:style-name="T65">de </text:span>datos no confiables antes de colocarlos aqui...;&gt;text&lt;/style&gt; valor de propiedad</text:p>
        </text:list-item>
      </text:list>
      <text:p text:style-name="P9">Excepto los caracteres alfanuméricos, <text:span text:style-name="T56">codificar caracteres de escape a</text:span> todo carácter con valores ASCII menores a 256, con el formato #xHH. No utilizar <text:span text:style-name="T56">caracteres de escape</text:span> como la barra invertida porque los caracteres como las comillas serán reemplazados por su codificación HTML correspondiente.</text:p>
      <text:h text:style-name="P131" text:outline-level="4"><text:bookmark-start text:name="__RefHeading___Toc10931_17893600741"/>Regla #5 - <text:span text:style-name="T29">Agregar caracteres de escape</text:span> URL antes de insertar datos no confiables en atributos URL<text:bookmark-end text:name="__RefHeading___Toc10931_17893600741"/></text:h>
      <text:p text:style-name="P8">Se utiliza para los casos en que deseamos colocar datos no confiables en un link que apunta a otro lugar. Esto incluye a los atributos href y src. Existen otros atributos de locación, pero no es recomendable colocar datos no confiables en ellos. Algo importante de remarcar es que resulta muy mala idea colocar datos no confiables en URLs javascript:, pero de ser necesario se puede utilizar la regla #3 para ello.</text:p>
      <text:list xml:id="list997148704" text:style-name="L23">
        <text:list-item>
          <text:p text:style-name="P108">&lt;a href=http://...<text:span text:style-name="T56">Codificar caracteres de escape</text:span> datos no confiables antes de colocarlos aqui...&gt;link&lt;/a &gt; un link normal</text:p>
        </text:list-item>
        <text:list-item>
          <text:p text:style-name="P109">&lt;img src='http://... <text:span text:style-name="T56">Codificar caracteres de escape</text:span> datos no confiables antes de colocarlos aqui...' /&gt; fuente de una imagen</text:p>
        </text:list-item>
        <text:list-item>
          <text:p text:style-name="P109">&lt;script src="http://... <text:span text:style-name="T56">Codificar caracteres de escape</text:span> Datos no confiables antes de colocarlos aqui..." /&gt; archivo script</text:p>
        </text:list-item>
      </text:list>
      <text:p text:style-name="P8">Excepto los caracteres alfanuméricos, <text:span text:style-name="T56">codificar caracteres de escape para </text:span>todo carácter con valores ASCII menores a 256, con el formato #xHH. Incluir datos no confiables en URLs data: no debería estar permitido, debido a que no hay una buena forma de deshabilitar ataques con <text:span text:style-name="T56">caracteres de escape</text:span> para prevenir el salirse de la URL.</text:p>
      <text:h text:style-name="P132" text:outline-level="4"><text:bookmark-start text:name="__RefHeading___Toc10933_17893600741"/>R<text:span text:style-name="T25">egla</text:span> #6 - Desinfecte Formato HTML con una biblioteca diseñada para el empleo<text:bookmark-end text:name="__RefHeading___Toc10933_17893600741"/></text:h>
      <text:p text:style-name="P8">Para facilitar la validación del ingreso de datos existen librerías que facilitan el trabajo de los programadores. Hay varios disponibles en OWASP que son simples de usar, para mayor referencia dirigirse a </text:p>
      <text:p text:style-name="P61">OWASP AntiSamy - https://www.owasp.org/index.php/Category:OWASP_AntiSamy_Project </text:p>
      <text:p text:style-name="P61">import org.owasp.validator.html.*;</text:p>
      <text:p text:style-name="P61">Policy policy = Policy.getInstance(POLICY_FILE_LOCATION);</text:p>
      <text:p text:style-name="P61">AntiSamy as = new AntiSamy();</text:p>
      <text:p text:style-name="P61"><text:soft-page-break/>CleanResults cr = as.scan(dirtyInput, policy);</text:p>
      <text:p text:style-name="P61">MyUserDAO.storeUserProfile(cr.getCleanHTML()); // some custom function</text:p>
      <text:p text:style-name="P61"/>
      <text:p text:style-name="P61">OWASP Java HTML Sanitizer - https://www.owasp.org/index.php/OWASP_Java_HTML_Sanitizer_Project </text:p>
      <text:p text:style-name="P61">import org.owasp.html.Sanitizers;</text:p>
      <text:p text:style-name="P61">import org.owasp.html.PolicyFactory;</text:p>
      <text:p text:style-name="P61">PolicyFactory sanitizer = Sanitizers.FORMATTING.and(Sanitizers.BLOCKS);</text:p>
      <text:p text:style-name="P61">String cleanResults = sanitizer.sanitize("&lt;p&gt;Hello, &lt;b&gt;World!&lt;/b&gt;");</text:p>
      <text:p text:style-name="P8">La prevención de todas las fallas de XSS en una aplicación es difícil. Para ayudar a mitigar el impacto de una falla XSS en su sitio, OWASP recomienda también establece el indicador HTTPOnly en las cookies de sesión y las personalizadas que no se tiene acceso por cualquier Javascript que escribiste. Esta bandera es típicamente de cookies de forma predeterminada en apps del NET, pero en otros idiomas hay que configurar manualmente. HTPPOnly, sirve para que las cookies no sean accesible por código script, y solo se enviara en conexiones HTTP.</text:p>
      <text:h text:style-name="Heading_20_5" text:outline-level="5"><text:bookmark-start text:name="__RefHeading___Toc1602_2119074807"/>Implementar Contenido Política de Seguridad (CSP)<text:bookmark-end text:name="__RefHeading___Toc1602_2119074807"/></text:h>
      <text:p text:style-name="P8">Hay otra buena solución compleja para mitigar el impacto de una falla XSS llamado contenido Política de Seguridad. Es un mecanismo de lado del navegador que te permite crear listas blancas de origen de los recursos del lado del cliente de la aplicación web, por ejemplo, JavaScript, CSS, imágenes, etc a través de CSP encabezado HTTP especial instruye al navegador solo para ejecutar o dejar sin recursos de esas fuentes. Por ejemplo este CSP </text:p>
      <text:p text:style-name="P61">Contento-Security-Política: default-src: "yo"; script src: static.domain.tld 'auto' </text:p>
      <text:p text:style-name="P8">instruirá navegador web para cargar todos los recursos solo desde el origen de la página y el código fuente de los archivos JavaScript adicionalmente desde static.domain.tld. </text:p>
      <text:p text:style-name="Quotations"><text:span text:style-name="T57">Nota:</text:span> La aplicación debe tener certificado su funcionamiento en Internet Explorer versión 8 o superior, o en su defecto en Mozilla Firefox 3+</text:p>
      <text:h text:style-name="Heading_20_3" text:outline-level="3"><text:bookmark-start text:name="__RefHeading___Toc1940_1298836283"/>Referencia directa insegura a objetos <text:span text:style-name="T63">A4</text:span><text:bookmark-end text:name="__RefHeading___Toc1940_1298836283"/></text:h>
      <text:p text:style-name="P42">Para evitar estos inconvenientes se puede:</text:p>
      <text:list xml:id="list2144709266" text:style-name="L24">
        <text:list-item>
          <text:p text:style-name="P110">Utilizar referencias indirectas por usuario o sesión.</text:p>
        </text:list-item>
      </text:list>
      <text:p text:style-name="P60"><text:span text:style-name="T44">&lt;J&gt; </text:span>&lt;P&gt;Las direcciones URL que son para solicitud de recurso debe contener controles para que las solicitudes por parámetros identifiquen que la solicitud se realizar desde una sesión en particular que se encuentre accedida de forma segura y no pueda ser reprisada. </text:p>
      <text:p text:style-name="P60"><text:soft-page-break/>Ejemplo: <text:a xlink:type="simple" xlink:href="http://dominioEjemplo/aplicacion/parametro1=0102581709" text:style-name="Internet_20_link" text:visited-style-name="Visited_20_Internet_20_Link">http://dominioEjemplo/aplicacion/parametro1=0102581709</text:a> debe ser controlado para evitar que este url pueda ser utilizado si el usuario no esta accedido al sistema.</text:p>
      <text:h text:style-name="Heading_20_3" text:outline-level="3"><text:bookmark-start text:name="__RefHeading___Toc1606_2119074807"/><text:span text:style-name="T61">Configuración de Seguridad Incorrecta</text:span> <text:span text:style-name="T60">A5</text:span><text:bookmark-end text:name="__RefHeading___Toc1606_2119074807"/></text:h>
      <text:p text:style-name="P43">En este <text:span text:style-name="T62">item</text:span> se ven involucrados los demás áreas tecnológicas para fortalecimiento integral de las seguridades de los aplicativos.</text:p>
      <text:list xml:id="list3573477930" text:style-name="L25">
        <text:list-item>
          <text:p text:style-name="P111">No dejar las configuraciones por defecto, </text:p>
        </text:list-item>
        <text:list-item>
          <text:p text:style-name="P111">Probar seguridades de las configuraciones realizadas <text:span text:style-name="T36">de forma periódica</text:span></text:p>
        </text:list-item>
        <text:list-item>
          <text:p text:style-name="P80">Personalizar los mensajes de error de la aplicación y del servidor, tener control de los errores en las aplicaciones.</text:p>
        </text:list-item>
        <text:list-item>
          <text:p text:style-name="P80">Especificar los puertos que necesita la aplicación para funcionar.</text:p>
        </text:list-item>
      </text:list>
      <text:h text:style-name="Heading_20_3" text:outline-level="3"><text:bookmark-start text:name="__RefHeading___Toc1942_1298836283"/><text:span text:style-name="T60">Exposición</text:span> de datos sensibles A6<text:bookmark-end text:name="__RefHeading___Toc1942_1298836283"/></text:h>
      <text:p text:style-name="P41">Actualmente la institución lleva a cabo un proceso de licuado de datos sensibles para los ambientes de desarrollo y de pruebas, dejando el ambiente de certificación con una copia exacta.</text:p>
      <text:p text:style-name="P41">El acceso a los ambientes esta controlada, dando a los desarrolladores y usuarios al los ambientes licuados, y a los ambientes de certificación y de producción a los usuarios que tiene acceso y roles a los que tienen acceso en ambientes productivos.</text:p>
      <text:h text:style-name="Heading_20_3" text:outline-level="3"><text:bookmark-start text:name="__RefHeading___Toc1608_2119074807"/><text:span text:style-name="T63">Inexistente Control de Acceso a nivel de funcionalidades</text:span> <text:span text:style-name="T60">A7</text:span><text:bookmark-end text:name="__RefHeading___Toc1608_2119074807"/></text:h>
      <text:list xml:id="list113112409659674" text:continue-list="list3896478637" text:style-name="L10">
        <text:list-item>
          <text:p text:style-name="P112">Hacer un check list de perfiles de acceso y permisos desde un usuario de administradores</text:p>
        </text:list-item>
        <text:list-item>
          <text:p text:style-name="P112">Ejecutar el cambio y verificar los niveles de acceso y autorización</text:p>
        </text:list-item>
        <text:list-item>
          <text:p text:style-name="P112">Verificar que la funcionalidad sea la correcta para el perfil asignado y que esta cambie con un distinto perfil.</text:p>
        </text:list-item>
      </text:list>
      <text:h text:style-name="Heading_20_3" text:outline-level="3">Falsificación de Peticiones en Sitios Cruzados (CSRF) <text:span text:style-name="T64">A9</text:span></text:h>
      <text:list xml:id="list1175157560" text:style-name="L26">
        <text:list-item>
          <text:p text:style-name="P113">Verificar que las solicitudes de peticiones contengan un token de manera oculta que identifique de manera única las solicitudes.</text:p>
        </text:list-item>
        <text:list-item>
          <text:p text:style-name="P113">El token puede ser usado en el url directamente.</text:p>
        </text:list-item>
      </text:list>
      <text:h text:style-name="P129" text:outline-level="3">Uso de Componentes con vulnerabilidades Conocidas A10</text:h>
      <text:list xml:id="list1157243369" text:style-name="L27">
        <text:list-item>
          <text:p text:style-name="P114">Tener el listado de todos los componentes</text:p>
        </text:list-item>
        <text:list-item>
          <text:p text:style-name="P114">Cada componente debe tener la información relacionada con: procedencia, soporte, arquitectura y versiones recomendadas y MD5 de descarga de estar disponible.</text:p>
        </text:list-item>
        <text:list-item>
          <text:p text:style-name="P114"><text:soft-page-break/>Hacer cumplir estos pasas a todos lo componentes de terceros.</text:p>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6">Índice de contenido</text:p>
          </text:index-title>
          <text:p text:style-name="P66"><text:a xlink:type="simple" xlink:href="#__RefHeading__1908_1276364847" text:style-name="Index_20_Link" text:visited-style-name="Index_20_Link">Introducción<text:tab/>1</text:a></text:p>
          <text:p text:style-name="P68"><text:a xlink:type="simple" xlink:href="#__RefHeading__1910_1276364847" text:style-name="Index_20_Link" text:visited-style-name="Index_20_Link">Sobre el documento<text:tab/>1</text:a></text:p>
          <text:p text:style-name="P68"><text:a xlink:type="simple" xlink:href="#__RefHeading__2177_552988821" text:style-name="Index_20_Link" text:visited-style-name="Index_20_Link">Sobre la aplicación de este documento<text:tab/>1</text:a></text:p>
          <text:p text:style-name="P68"><text:a xlink:type="simple" xlink:href="#__RefHeading__1928_1276364847" text:style-name="Index_20_Link" text:visited-style-name="Index_20_Link">Lista de acrónimos:<text:tab/>1</text:a></text:p>
          <text:p text:style-name="P68"><text:a xlink:type="simple" xlink:href="#__RefHeading___Toc3201_1328538540" text:style-name="Index_20_Link" text:visited-style-name="Index_20_Link">Terminología<text:tab/>1</text:a></text:p>
          <text:p text:style-name="P68"><text:a xlink:type="simple" xlink:href="#__RefHeading__1930_1276364847" text:style-name="Index_20_Link" text:visited-style-name="Index_20_Link">Cambio de Versión<text:tab/>2</text:a></text:p>
          <text:p text:style-name="P66"><text:a xlink:type="simple" xlink:href="#__RefHeading__1932_1276364847" text:style-name="Index_20_Link" text:visited-style-name="Index_20_Link">Principios del desarrollo seguro, aplicaciones de escritorio, Web y Móviles [1]<text:tab/>3</text:a></text:p>
          <text:p text:style-name="P66"><text:a xlink:type="simple" xlink:href="#__RefHeading__2087_552988821" text:style-name="Index_20_Link" text:visited-style-name="Index_20_Link">Recomendaciones OWASP para el desarrollo web [2]<text:tab/>5</text:a></text:p>
          <text:p text:style-name="P67"><text:a xlink:type="simple" xlink:href="#__RefHeading___Toc10684_1789360074" text:style-name="Index_20_Link" text:visited-style-name="Index_20_Link">Inyección SQL A1<text:tab/>5</text:a></text:p>
          <text:p text:style-name="P67"><text:a xlink:type="simple" xlink:href="#__RefHeading___Toc11682_1789360074" text:style-name="Index_20_Link" text:visited-style-name="Index_20_Link">Perdida Autenticación y gestión de sesiones A2<text:tab/>5</text:a></text:p>
          <text:p text:style-name="P67"><text:a xlink:type="simple" xlink:href="#__RefHeading___Toc10773_1789360074" text:style-name="Index_20_Link" text:visited-style-name="Index_20_Link">Secuencia de Comandos en Sitios Cruzados XSS A3<text:tab/>5</text:a></text:p>
          <text:p text:style-name="P67"><text:a xlink:type="simple" xlink:href="#__RefHeading___Toc10785_1789360074" text:style-name="Index_20_Link" text:visited-style-name="Index_20_Link">Referencia Directa Insegura a objetos A4<text:tab/>6</text:a></text:p>
          <text:p text:style-name="P67"><text:a xlink:type="simple" xlink:href="#__RefHeading___Toc11890_1789360074" text:style-name="Index_20_Link" text:visited-style-name="Index_20_Link">Configuración de Seguridad Incorrecta A5<text:tab/>6</text:a></text:p>
          <text:p text:style-name="P67"><text:a xlink:type="simple" xlink:href="#__RefHeading___Toc11892_1789360074" text:style-name="Index_20_Link" text:visited-style-name="Index_20_Link">Exposición de datos Sensibles A6<text:tab/>6</text:a></text:p>
          <text:p text:style-name="P67"><text:a xlink:type="simple" xlink:href="#__RefHeading___Toc11894_1789360074" text:style-name="Index_20_Link" text:visited-style-name="Index_20_Link">Ausencia de control de acceso a las funciones A7<text:tab/>7</text:a></text:p>
          <text:p text:style-name="P67"><text:a xlink:type="simple" xlink:href="#__RefHeading___Toc10787_1789360074" text:style-name="Index_20_Link" text:visited-style-name="Index_20_Link">CSRF Falsificación a sitios cruzados A8<text:tab/>7</text:a></text:p>
          <text:p text:style-name="P67"><text:a xlink:type="simple" xlink:href="#__RefHeading___Toc1576_2119074807" text:style-name="Index_20_Link" text:visited-style-name="Index_20_Link">Utilización de componentes con vulnerabilidades conocidas A9<text:tab/>7</text:a></text:p>
          <text:p text:style-name="P67"><text:a xlink:type="simple" xlink:href="#__RefHeading___Toc10791_1789360074" text:style-name="Index_20_Link" text:visited-style-name="Index_20_Link">Miselaneos<text:tab/>8</text:a></text:p>
          <text:p text:style-name="P66"><text:a xlink:type="simple" xlink:href="#__RefHeading___Toc3572_1328538540" text:style-name="Index_20_Link" text:visited-style-name="Index_20_Link">Ejemplos y aplicación de recomendaciones<text:tab/>9</text:a></text:p>
          <text:p text:style-name="P67"><text:a xlink:type="simple" xlink:href="#__RefHeading___Toc1578_2119074807" text:style-name="Index_20_Link" text:visited-style-name="Index_20_Link">Acción: Desarrollo Seguro<text:tab/>9</text:a></text:p>
          <text:p text:style-name="P68"><text:a xlink:type="simple" xlink:href="#__RefHeading___Toc1580_2119074807" text:style-name="Index_20_Link" text:visited-style-name="Index_20_Link">Permisos mínimos:<text:tab/>9</text:a></text:p>
          <text:p text:style-name="P68"><text:a xlink:type="simple" xlink:href="#__RefHeading___Toc1582_2119074807" text:style-name="Index_20_Link" text:visited-style-name="Index_20_Link">Retiro de andamios<text:tab/>9</text:a></text:p>
          <text:p text:style-name="P68"><text:a xlink:type="simple" xlink:href="#__RefHeading___Toc1584_2119074807" text:style-name="Index_20_Link" text:visited-style-name="Index_20_Link">Inyección SQL<text:tab/>10</text:a></text:p>
          <text:p text:style-name="P68"><text:a xlink:type="simple" xlink:href="#__RefHeading___Toc1586_2119074807" text:style-name="Index_20_Link" text:visited-style-name="Index_20_Link">Evitar obsolescencia<text:tab/>10</text:a></text:p>
          <text:p text:style-name="P68"><text:a xlink:type="simple" xlink:href="#__RefHeading___Toc1588_2119074807" text:style-name="Index_20_Link" text:visited-style-name="Index_20_Link">No usar puertas traseras<text:tab/>10</text:a></text:p>
          <text:p text:style-name="P68"><text:a xlink:type="simple" xlink:href="#__RefHeading___Toc1590_2119074807" text:style-name="Index_20_Link" text:visited-style-name="Index_20_Link">Exposición de datos Sensibles<text:tab/>11</text:a></text:p>
          <text:p text:style-name="P68"><text:a xlink:type="simple" xlink:href="#__RefHeading___Toc1592_2119074807" text:style-name="Index_20_Link" text:visited-style-name="Index_20_Link">Mide tres vez y corta una vez<text:tab/>11</text:a></text:p>
          <text:p text:style-name="P68"><text:a xlink:type="simple" xlink:href="#__RefHeading___Toc1594_2119074807" text:style-name="Index_20_Link" text:visited-style-name="Index_20_Link">Conocer tus vulnerabilidades<text:tab/>11</text:a></text:p>
          <text:p text:style-name="P67"><text:a xlink:type="simple" xlink:href="#__RefHeading___Toc1428_670898744" text:style-name="Index_20_Link" text:visited-style-name="Index_20_Link">Acción: OWASP<text:tab/>11</text:a></text:p>
          <text:p text:style-name="P68"><text:a xlink:type="simple" xlink:href="#__RefHeading___Toc1426_670898744" text:style-name="Index_20_Link" text:visited-style-name="Index_20_Link">Inyección SQL A1<text:tab/>11</text:a></text:p>
          <text:p text:style-name="P68"><text:a xlink:type="simple" xlink:href="#__RefHeading___Toc1596_2119074807" text:style-name="Index_20_Link" text:visited-style-name="Index_20_Link">Perdida Autenticación y gestión de sesiones A2<text:tab/>12</text:a></text:p>
          <text:p text:style-name="P68"><text:a xlink:type="simple" xlink:href="#__RefHeading___Toc11684_1789360074" text:style-name="Index_20_Link" text:visited-style-name="Index_20_Link">Aplicación de reglas XSS [3] A3<text:tab/>12</text:a></text:p>
          <text:p text:style-name="P65"><text:a xlink:type="simple" xlink:href="#__RefHeading___Toc1598_2119074807" text:style-name="Index_20_Link" text:visited-style-name="Index_20_Link">Regla #0 - Nunca insertar datos no confiables excepto en lugares permitidos<text:tab/>12</text:a></text:p>
          <text:p text:style-name="P65"><text:a xlink:type="simple" xlink:href="#__RefHeading___Toc10781_17893600741" text:style-name="Index_20_Link" text:visited-style-name="Index_20_Link">Regla #1 - Agregar caracteres de escape HTML antes de insertar datos no confiables en el contenido de un elemento HTML<text:tab/>12</text:a></text:p>
          <text:p text:style-name="P65"><text:a xlink:type="simple" xlink:href="#__RefHeading___Toc10923_17893600741" text:style-name="Index_20_Link" text:visited-style-name="Index_20_Link">Regla #2 - Agregar caracteres de escape atributos antes de insertar datos no confiables en atributos HTML comunes<text:tab/>14</text:a></text:p>
          <text:p text:style-name="P65"><text:a xlink:type="simple" xlink:href="#__RefHeading___Toc10925_17893600741" text:style-name="Index_20_Link" text:visited-style-name="Index_20_Link">Regla #3 - Agregar caracteres de escape JavaScript antes de insertar datos no confiables en datos JavaScript<text:tab/>14</text:a></text:p>
          <text:p text:style-name="P70"><text:a xlink:type="simple" xlink:href="#__RefHeading___Toc10927_17893600741" text:style-name="Index_20_Link" text:visited-style-name="Index_20_Link">Regla # 3.1 - Valores JSON de escape en un contexto HTML y leer los datos con JSON.parse<text:tab/>15</text:a></text:p>
          <text:p text:style-name="P70"><text:a xlink:type="simple" xlink:href="#__RefHeading___Toc1600_2119074807" text:style-name="Index_20_Link" text:visited-style-name="Index_20_Link">La codificación de entidades HTML<text:tab/>16</text:a></text:p>
          <text:p text:style-name="P65"><text:a xlink:type="simple" xlink:href="#__RefHeading___Toc10929_17893600741" text:style-name="Index_20_Link" text:visited-style-name="Index_20_Link">Regla #4 - Agregar caracteres de escape CSS antes de insertar datos no confiables en propiedades HTML de estilo<text:tab/>16</text:a></text:p>
          <text:p text:style-name="P65"><text:a xlink:type="simple" xlink:href="#__RefHeading___Toc10931_17893600741" text:style-name="Index_20_Link" text:visited-style-name="Index_20_Link">Regla #5 - Agregar caracteres de escape URL antes de insertar datos no confiables en atributos URL<text:tab/>17</text:a></text:p>
          <text:p text:style-name="P65"><text:soft-page-break/><text:a xlink:type="simple" xlink:href="#__RefHeading___Toc10933_17893600741" text:style-name="Index_20_Link" text:visited-style-name="Index_20_Link">Regla #6 - Desinfecte Formato HTML con una biblioteca diseñada para el empleo<text:tab/>17</text:a></text:p>
          <text:p text:style-name="P70"><text:a xlink:type="simple" xlink:href="#__RefHeading___Toc1602_2119074807" text:style-name="Index_20_Link" text:visited-style-name="Index_20_Link">Implementar Contenido Política de Seguridad (CSP)<text:tab/>18</text:a></text:p>
          <text:p text:style-name="P68"><text:a xlink:type="simple" xlink:href="#__RefHeading___Toc1940_1298836283" text:style-name="Index_20_Link" text:visited-style-name="Index_20_Link">Referencia directa insegura a objetos A4<text:tab/>18</text:a></text:p>
          <text:p text:style-name="P68"><text:a xlink:type="simple" xlink:href="#__RefHeading___Toc1606_2119074807" text:style-name="Index_20_Link" text:visited-style-name="Index_20_Link">Configuración de Seguridad Incorrecta A5<text:tab/>19</text:a></text:p>
          <text:p text:style-name="P68"><text:a xlink:type="simple" xlink:href="#__RefHeading___Toc1942_1298836283" text:style-name="Index_20_Link" text:visited-style-name="Index_20_Link">Exposición de datos sensibles A6<text:tab/>19</text:a></text:p>
          <text:p text:style-name="P68"><text:a xlink:type="simple" xlink:href="#__RefHeading___Toc1608_2119074807" text:style-name="Index_20_Link" text:visited-style-name="Index_20_Link">Inexistente Control de Acceso a nivel de funcionalidades A7<text:tab/>19</text:a></text:p>
        </text:index-body>
      </text:table-of-content>
      <text:p text:style-name="P4"/>
      <text:p text:style-name="P55"/>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index-entry-span>, </text:index-entry-span>
            <text:index-entry-bibliography text:style-name="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1" text:name="Bibliografía1_Head">
            <text:p text:style-name="Bibliography_20_Heading">Bibliografía</text:p>
          </text:index-title>
          <text:p text:style-name="P69">1: <text:s/>Camilo Gutiérrez Amaya, Los 10 principios básicos para un desarrollo seguro, 2014, http://www.welivesecurity.com/la-es/2014/02/28/10-principios-basicos-para-desarrollo-seguro/</text:p>
          <text:p text:style-name="P69">2: OWASP FUNDATION, OWASP Top 10 - 2013, 2013, https://www.owasp.org/images/5/5f/OWASP_Top_10_-_2013_Final_-_Espa%C3%B1ol.pdf</text:p>
          <text:p text:style-name="P69">3: Eoin Keary - eoin.keary@owasp.org <text:s/>Jeff Williams - jeff.williams@owasp.org <text:s/>Jim Manico - jim@owasp.org <text:s/>Neil Mattatall - neil@owasp.org , XSS (Cross Site Scripting) Prevention Cheat Sheet, 2015, https://www.owasp.org/index.php/XSS_%28Cross_Site_Scripting%29_Prevention_Cheat_Sheet</text:p>
        </text:index-body>
      </text:bibliograph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officeooo:rsid="001413d3" officeooo:paragraph-rsid="001413d3"/>
    </style:style>
    <style:style style:name="MP2" style:family="paragraph" style:parent-style-name="Footer">
      <style:text-properties fo:font-size="10pt" fo:font-weight="bold" officeooo:rsid="008109ed" officeooo:paragraph-rsid="008109ed" style:font-size-asian="10pt" style:font-weight-asian="bold" style:font-size-complex="10pt" style:font-weight-complex="bold"/>
    </style:style>
    <style:style style:name="MP3" style:family="paragraph" style:parent-style-name="Footer">
      <style:text-properties fo:font-size="10pt" fo:font-weight="bold" officeooo:rsid="008109ed" officeooo:paragraph-rsid="0093b6ad" style:font-size-asian="10pt" style:font-weight-asian="bold" style:font-size-complex="10pt" style:font-weight-complex="bold"/>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1.161cm" svg:y="-1.81cm" svg:width="19.001cm" svg:height="2.75cm" draw:z-index="22"><draw:image xlink:href="Pictures/10000201000009230000014F1ECF4425100D09CC.png" xlink:type="simple" xlink:show="embed" xlink:actuate="onLoad" loext:mime-type="image/png"/></draw:frame></text:p>
      </style:header>
      <style:footer>
        <text:p text:style-name="MP2"><draw:frame draw:style-name="Mfr2" draw:name="Imagen1" text:anchor-type="paragraph" svg:x="-0.951cm" svg:y="0cm" svg:width="19.001cm" svg:height="1.67cm" draw:z-index="45"><draw:image xlink:href="Pictures/1000020100000923000000D1A65605F9B737A58D.png" xlink:type="simple" xlink:show="embed" xlink:actuate="onLoad" loext:mime-type="image/png"/></draw:frame>o.velez@jardinazuayo.fin.ec</text:p>
      </style:footer>
    </style:master-page>
    <style:master-page style:name="HTML" style:page-layout-name="Mpm2"/>
    <style:master-page style:name="Landscape" style:page-layout-name="Mpm3">
      <style:footer>
        <text:p text:style-name="MP3"><draw:frame draw:style-name="Mfr3" draw:name="Imagen57" text:anchor-type="paragraph" svg:y="0cm" svg:width="19.001cm" svg:height="1.67cm" draw:z-index="0"><draw:image xlink:href="Pictures/1000020100000923000000D1A65605F9B737A58D.png" xlink:type="simple" xlink:show="embed" xlink:actuate="onLoad" loext:mime-type="image/png"/></draw:frame><text:s text:c="38"/>o.velez@jardinazuayo.fin.e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0:57:29.373201151</meta:creation-date>
    <meta:editing-duration>P1DT51M52S</meta:editing-duration>
    <meta:editing-cycles>71</meta:editing-cycles>
    <meta:generator>LibreOffice/6.0.4.1$Linux_X86_64 LibreOffice_project/00m0$Build-1</meta:generator>
    <dc:date>2018-09-25T11:31:07.463824212</dc:date>
    <meta:document-statistic meta:table-count="5" meta:image-count="3" meta:object-count="0" meta:page-count="23" meta:paragraph-count="394" meta:word-count="5800" meta:character-count="37291" meta:non-whitespace-character-count="31903"/>
  </office:meta>
</office:document-meta>
</file>